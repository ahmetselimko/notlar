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000000780000004382910415F.png" manifest:media-type="image/png"/>
  <manifest:file-entry manifest:full-path="Pictures/100000000000011D000000B13660D2C5.png" manifest:media-type="image/png"/>
  <manifest:file-entry manifest:full-path="Pictures/10000000000004B000000320D5AFC3BE.png" manifest:media-type="image/png"/>
  <manifest:file-entry manifest:full-path="Pictures/1000000000000300000001BA748CCF46.png" manifest:media-type="image/png"/>
  <manifest:file-entry manifest:full-path="Pictures/10000000000001180000012F7D2631F8.png" manifest:media-type="image/png"/>
  <manifest:file-entry manifest:full-path="Pictures/10000000000007BF00000230DB3822D1.png" manifest:media-type="image/png"/>
  <manifest:file-entry manifest:full-path="Pictures/1000000000000A00000007CEC23CCCEF.png" manifest:media-type="image/png"/>
  <manifest:file-entry manifest:full-path="Pictures/10000000000003E70000025F4FE19E82.png" manifest:media-type="image/png"/>
  <manifest:file-entry manifest:full-path="Pictures/10000001000005C6000005DEE1BDE4A6.png" manifest:media-type="image/png"/>
  <manifest:file-entry manifest:full-path="Pictures/10000000000001D6000001AC15DE8FE7.png" manifest:media-type="image/png"/>
  <manifest:file-entry manifest:full-path="Pictures/100000010000027000000270FCFEEFBE.png" manifest:media-type="image/png"/>
  <manifest:file-entry manifest:full-path="Pictures/10000000000002EB000002D002C266F8.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 Sans" svg:font-family="'Open Sans'"/>
    <style:font-face style:name="OpenSymbol" svg:font-family="OpenSymbol" style:font-charset="x-symbol"/>
    <style:font-face style:name="Poppins" svg:font-family="Poppins, sans-serif"/>
    <style:font-face style:name="TT Norms" svg:font-family="'TT Norms', Helvetica, Arial, sans-serif"/>
    <style:font-face style:name="Times New Roman" svg:font-family="'Times New Roman'" style:font-family-generic="roman" style:font-pitch="variable"/>
  </office:font-face-decls>
  <office:automatic-styles>
    <style:style style:name="Tablo1" style:family="table">
      <style:table-properties style:width="8.049cm" table:align="left"/>
    </style:style>
    <style:style style:name="Tablo1.A" style:family="table-column">
      <style:table-column-properties style:column-width="3.997cm"/>
    </style:style>
    <style:style style:name="Tablo1.B" style:family="table-column">
      <style:table-column-properties style:column-width="4.052cm"/>
    </style:style>
    <style:style style:name="Tablo1.A1" style:family="table-cell">
      <style:table-cell-properties style:vertical-align="middle" fo:padding="0.049cm" fo:border="0.05pt solid #000000"/>
    </style:style>
    <style:style style:name="P1" style:family="paragraph" style:parent-style-name="Standard">
      <style:text-properties fo:color="#000000" loext:opacity="100%" style:font-name="Times New Roman" fo:font-size="14pt" fo:font-style="normal" fo:font-weight="bold" officeooo:rsid="0009a2e2" officeooo:paragraph-rsid="0009a2e2" fo:background-color="#ffffff" style:font-size-asian="14pt" style:font-style-asian="normal" style:font-weight-asian="bold" style:font-size-complex="14pt" style:font-style-complex="normal" style:font-weight-complex="bold"/>
    </style:style>
    <style:style style:name="P2" style:family="paragraph" style:parent-style-name="Heading_20_2">
      <style:text-properties fo:color="#000000" loext:opacity="100%" style:font-name="Times New Roman" fo:font-size="14pt" fo:font-style="normal" fo:font-weight="bold" officeooo:rsid="0009a2e2" officeooo:paragraph-rsid="0009a2e2" fo:background-color="#ffffff" style:font-size-asian="14pt" style:font-style-asian="normal" style:font-weight-asian="bold" style:font-size-complex="14pt" style:font-style-complex="normal" style:font-weight-complex="bold"/>
    </style:style>
    <style:style style:name="P3" style:family="paragraph" style:parent-style-name="Standard">
      <style:text-properties officeooo:rsid="0009a2e2" officeooo:paragraph-rsid="000b8d53"/>
    </style:style>
    <style:style style:name="P4" style:family="paragraph" style:parent-style-name="Standard">
      <style:text-properties fo:font-variant="normal" fo:text-transform="none" fo:color="#000000" loext:opacity="100%" style:font-name="Times New Roman" fo:font-size="14pt" fo:letter-spacing="normal" fo:font-style="normal" fo:font-weight="normal" officeooo:rsid="000b8d53" officeooo:paragraph-rsid="000b8d53" fo:background-color="#ffffff" style:font-size-asian="14pt" style:font-style-asian="normal" style:font-weight-asian="normal" style:font-size-complex="14pt" style:font-style-complex="normal" style:font-weight-complex="normal"/>
    </style:style>
    <style:style style:name="P5" style:family="paragraph" style:parent-style-name="Standard">
      <style:text-properties fo:color="#000000" loext:opacity="100%" style:font-name="Times New Roman" fo:font-size="14pt" fo:font-style="normal" fo:font-weight="normal" officeooo:rsid="0009a2e2" officeooo:paragraph-rsid="0009a2e2" fo:background-color="#ffffff" style:font-size-asian="14pt" style:font-style-asian="normal" style:font-weight-asian="normal" style:font-size-complex="14pt" style:font-style-complex="normal" style:font-weight-complex="normal"/>
    </style:style>
    <style:style style:name="P6" style:family="paragraph" style:parent-style-name="Standard">
      <style:text-properties fo:font-variant="normal" fo:text-transform="none" fo:color="#000000" loext:opacity="100%" style:font-name="Times New Roman" fo:font-size="14pt" fo:letter-spacing="normal" fo:font-style="normal" fo:font-weight="normal" officeooo:rsid="0009a2e2" officeooo:paragraph-rsid="0009a2e2" fo:background-color="#ffffff" style:font-size-asian="14pt" style:font-style-asian="normal" style:font-weight-asian="normal" style:font-size-complex="14pt" style:font-style-complex="normal" style:font-weight-complex="normal"/>
    </style:style>
    <style:style style:name="P7" style:family="paragraph" style:parent-style-name="Standard">
      <style:text-properties fo:font-variant="normal" fo:text-transform="none" fo:color="#000000" loext:opacity="100%" style:font-name="Times New Roman" fo:font-size="14pt" fo:letter-spacing="normal" fo:font-style="normal" fo:font-weight="bold" officeooo:rsid="0009a2e2" officeooo:paragraph-rsid="0009a2e2" fo:background-color="#ffffff" style:font-size-asian="14pt" style:font-style-asian="normal" style:font-weight-asian="bold" style:font-size-complex="14pt" style:font-style-complex="normal" style:font-weight-complex="bold"/>
    </style:style>
    <style:style style:name="P8" style:family="paragraph" style:parent-style-name="Standard">
      <style:text-properties fo:color="#000000" loext:opacity="100%" style:font-name="Times New Roman" fo:font-size="14pt" fo:font-style="normal" fo:font-weight="bold" officeooo:rsid="000b8d53" officeooo:paragraph-rsid="000b8d53" fo:background-color="#ffffff" style:font-size-asian="14pt" style:font-style-asian="normal" style:font-weight-asian="bold" style:font-size-complex="14pt" style:font-style-complex="normal" style:font-weight-complex="bold"/>
    </style:style>
    <style:style style:name="P9" style:family="paragraph" style:parent-style-name="Standard">
      <style:text-properties fo:color="#000000" loext:opacity="100%" style:font-name="Times New Roman" fo:font-size="14pt" fo:font-style="normal" fo:font-weight="normal" officeooo:rsid="000b8d53" officeooo:paragraph-rsid="000b8d53" fo:background-color="#ffffff" style:font-size-asian="14pt" style:font-style-asian="normal" style:font-weight-asian="normal" style:font-size-complex="14pt" style:font-style-complex="normal" style:font-weight-complex="normal"/>
    </style:style>
    <style:style style:name="P10" style:family="paragraph" style:parent-style-name="Standard">
      <style:text-properties officeooo:paragraph-rsid="000b8d53"/>
    </style:style>
    <style:style style:name="P11" style:family="paragraph" style:parent-style-name="Text_20_body">
      <style:text-properties officeooo:paragraph-rsid="000b8d53"/>
    </style:style>
    <style:style style:name="P12" style:family="paragraph" style:parent-style-name="Text_20_body" style:list-style-name="L1">
      <style:paragraph-properties fo:margin-left="0cm" fo:margin-right="0cm" fo:margin-top="0cm" fo:margin-bottom="0cm" style:contextual-spacing="false" fo:text-indent="0cm" style:auto-text-indent="false" fo:padding="0cm" fo:border="none"/>
      <style:text-properties style:font-name="Open Sans" fo:font-size="11.25pt" fo:font-weight="bold" officeooo:rsid="000b8d53" style:font-size-asian="12.25pt" style:font-size-complex="14pt"/>
    </style:style>
    <style:style style:name="P13" style:family="paragraph" style:parent-style-name="Text_20_body" style:list-style-name="L2">
      <style:paragraph-properties fo:margin-left="0cm" fo:margin-right="0cm" fo:margin-top="0cm" fo:margin-bottom="0cm" style:contextual-spacing="false" fo:text-indent="0cm" style:auto-text-indent="false" fo:padding="0cm" fo:border="none"/>
      <style:text-properties style:font-name="Times New Roman" fo:font-size="14pt" officeooo:rsid="000b8d53" style:font-size-asian="14pt" style:font-size-complex="14pt"/>
    </style:style>
    <style:style style:name="P14" style:family="paragraph" style:parent-style-name="Text_20_body" style:list-style-name="L3">
      <style:paragraph-properties fo:margin-left="0cm" fo:margin-right="0cm" fo:margin-top="0cm" fo:margin-bottom="0cm" style:contextual-spacing="false" fo:text-indent="0cm" style:auto-text-indent="false" fo:padding="0cm" fo:border="none"/>
      <style:text-properties style:font-name="Times New Roman" fo:font-size="14pt" officeooo:rsid="000b8d53" style:font-size-asian="14pt" style:font-size-complex="14pt"/>
    </style:style>
    <style:style style:name="P15" style:family="paragraph" style:parent-style-name="Heading_20_2">
      <style:text-properties officeooo:paragraph-rsid="000b8d53"/>
    </style:style>
    <style:style style:name="P16" style:family="paragraph" style:parent-style-name="Text_20_body">
      <style:paragraph-properties fo:margin-left="0cm" fo:margin-right="0cm" fo:margin-top="0cm" fo:margin-bottom="0cm" style:contextual-spacing="false" style:line-height-at-least="0.635cm" fo:text-align="start" style:justify-single-word="false" fo:orphans="2" fo:widows="2" fo:text-indent="0cm" style:auto-text-indent="false"/>
      <style:text-properties style:font-name="Times New Roman" fo:font-size="14pt" officeooo:rsid="000b8d53" style:font-size-asian="14pt" style:font-size-complex="14pt"/>
    </style:style>
    <style:style style:name="P17" style:family="paragraph" style:parent-style-name="Text_20_body" style:list-style-name="L4">
      <style:paragraph-properties fo:margin-left="0cm" fo:margin-right="0cm" fo:margin-top="0cm" fo:margin-bottom="0.247cm" style:contextual-spacing="false" style:line-height-at-least="0.635cm" fo:text-align="start" style:justify-single-word="false" fo:orphans="2" fo:widows="2" fo:text-indent="0cm" style:auto-text-indent="false"/>
      <style:text-properties style:font-name="Times New Roman" fo:font-size="14pt" officeooo:rsid="000b8d53" style:font-size-asian="14pt" style:font-size-complex="14pt"/>
    </style:style>
    <style:style style:name="P18" style:family="paragraph" style:parent-style-name="Heading_20_3">
      <style:text-properties officeooo:paragraph-rsid="000b8d53"/>
    </style:style>
    <style:style style:name="P19" style:family="paragraph" style:parent-style-name="Text_20_body">
      <style:text-properties fo:font-variant="normal" fo:text-transform="none" fo:color="#000000" loext:opacity="100%" style:font-name="Times New Roman" fo:font-size="14pt" fo:letter-spacing="normal" fo:font-style="normal" fo:font-weight="normal" officeooo:rsid="000b8d53" officeooo:paragraph-rsid="000b8d53" fo:background-color="#ffffff" style:font-size-asian="14pt" style:font-style-asian="normal" style:font-size-complex="14pt" style:font-style-complex="normal"/>
    </style:style>
    <style:style style:name="P20" style:family="paragraph" style:parent-style-name="Heading_20_3">
      <style:text-properties fo:font-variant="normal" fo:text-transform="none" fo:color="#000000" loext:opacity="100%" style:font-name="Times New Roman" fo:font-size="14pt" fo:letter-spacing="normal" fo:font-style="normal" fo:font-weight="normal" officeooo:rsid="000b8d53" officeooo:paragraph-rsid="000b8d53" fo:background-color="#ffffff" style:font-size-asian="14pt" style:font-style-asian="normal" style:font-size-complex="14pt" style:font-style-complex="normal"/>
    </style:style>
    <style:style style:name="P21" style:family="paragraph" style:parent-style-name="Text_20_body">
      <style:paragraph-properties fo:margin-left="0cm" fo:margin-right="0cm" fo:text-align="start" style:justify-single-word="false" fo:orphans="2" fo:widows="2" fo:text-indent="0cm" style:auto-text-indent="false"/>
      <style:text-properties style:font-name="Times New Roman" fo:font-size="14pt" officeooo:rsid="000b8d53" style:font-size-asian="14pt" style:font-size-complex="14pt"/>
    </style:style>
    <style:style style:name="P22" style:family="paragraph" style:parent-style-name="Standard">
      <style:text-properties officeooo:paragraph-rsid="000ef5b4"/>
    </style:style>
    <style:style style:name="P23"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Times New Roman" fo:font-size="14pt" fo:letter-spacing="normal" fo:font-style="normal" fo:font-weight="normal" officeooo:rsid="000ef5b4" fo:background-color="#ffffff" style:font-size-asian="14pt" style:font-style-asian="normal" style:font-size-complex="14pt" style:font-style-complex="normal"/>
    </style:style>
    <style:style style:name="P24" style:family="paragraph" style:parent-style-name="Text_20_body" style:list-style-name="L5">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Times New Roman" fo:font-size="14pt" fo:letter-spacing="normal" fo:font-style="normal" fo:font-weight="normal" officeooo:rsid="000ef5b4" fo:background-color="#ffffff" style:font-size-asian="14pt" style:font-style-asian="normal" style:font-size-complex="14pt" style:font-style-complex="normal"/>
    </style:style>
    <style:style style:name="P25" style:family="paragraph" style:parent-style-name="Text_20_body" style:list-style-name="L6">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Times New Roman" fo:font-size="14pt" fo:letter-spacing="normal" fo:font-style="normal" fo:font-weight="normal" officeooo:rsid="000ef5b4" fo:background-color="#ffffff" style:font-size-asian="14pt" style:font-style-asian="normal" style:font-size-complex="14pt" style:font-style-complex="normal"/>
    </style:style>
    <style:style style:name="P26" style:family="paragraph" style:parent-style-name="Standard">
      <style:text-properties officeooo:paragraph-rsid="0010c743"/>
    </style:style>
    <style:style style:name="P27" style:family="paragraph" style:parent-style-name="Standard">
      <style:text-properties officeooo:paragraph-rsid="0010d872"/>
    </style:style>
    <style:style style:name="P28" style:family="paragraph" style:parent-style-name="Text_20_body">
      <style:text-properties officeooo:paragraph-rsid="0010d872"/>
    </style:style>
    <style:style style:name="P29" style:family="paragraph" style:parent-style-name="Text_20_body" style:list-style-name="L7">
      <style:paragraph-properties fo:margin-left="0.238cm" fo:margin-right="0cm" fo:margin-top="0cm" fo:margin-bottom="0cm" style:contextual-spacing="false" fo:line-height="131%" fo:orphans="75" fo:widows="2" fo:text-indent="0cm" style:auto-text-indent="false" fo:padding="0cm" fo:border="none"/>
      <style:text-properties style:font-name="Times New Roman" fo:font-size="14pt" officeooo:rsid="0010d872" style:font-size-asian="14pt" style:font-size-complex="14pt"/>
    </style:style>
    <style:style style:name="P30" style:family="paragraph" style:parent-style-name="Text_20_body" style:list-style-name="L7" style:master-page-name="">
      <loext:graphic-properties draw:fill="none"/>
      <style:paragraph-properties fo:margin-left="-0.199cm" fo:margin-right="0cm" fo:margin-top="0cm" fo:margin-bottom="0cm" style:contextual-spacing="false" fo:line-height="131%" fo:orphans="75" fo:widows="2" fo:text-indent="0cm" style:auto-text-indent="false" style:page-number="auto" fo:background-color="transparent" fo:padding="0cm" fo:border="none"/>
      <style:text-properties style:font-name="Times New Roman" fo:font-size="14pt" officeooo:rsid="0010d872" officeooo:paragraph-rsid="001974b6" style:font-size-asian="14pt" style:font-size-complex="14pt"/>
    </style:style>
    <style:style style:name="P31" style:family="paragraph" style:parent-style-name="Standard">
      <style:text-properties officeooo:paragraph-rsid="0011c16f"/>
    </style:style>
    <style:style style:name="P32" style:family="paragraph" style:parent-style-name="Text_20_body">
      <style:text-properties officeooo:paragraph-rsid="0011c16f"/>
    </style:style>
    <style:style style:name="P33" style:family="paragraph" style:parent-style-name="Text_20_body" style:list-style-name="L8">
      <style:paragraph-properties fo:margin-left="0.238cm" fo:margin-right="0cm" fo:margin-top="0cm" fo:margin-bottom="0cm" style:contextual-spacing="false" fo:line-height="131%" fo:orphans="75" fo:widows="2" fo:text-indent="0cm" style:auto-text-indent="false" fo:padding="0cm" fo:border="none"/>
      <style:text-properties style:font-name="Times New Roman" fo:font-size="14pt" officeooo:rsid="0011c16f" style:font-size-asian="14pt" style:font-size-complex="14pt"/>
    </style:style>
    <style:style style:name="P34" style:family="paragraph" style:parent-style-name="Text_20_body">
      <style:paragraph-properties fo:margin-left="0.238cm" fo:margin-right="0cm" fo:margin-top="0cm" fo:margin-bottom="0cm" style:contextual-spacing="false" fo:line-height="131%" fo:orphans="75" fo:widows="2" fo:text-indent="0cm" style:auto-text-indent="false" fo:padding="0cm" fo:border="none"/>
      <style:text-properties fo:font-variant="normal" fo:text-transform="none" fo:color="#000000" loext:opacity="100%" style:font-name="Times New Roman" fo:font-size="14pt" fo:letter-spacing="normal" fo:font-style="normal" fo:font-weight="normal" officeooo:rsid="0011c16f" fo:background-color="#ffffff" style:font-size-asian="14pt" style:font-style-asian="normal" style:font-size-complex="14pt" style:font-style-complex="normal"/>
    </style:style>
    <style:style style:name="P35" style:family="paragraph" style:parent-style-name="Text_20_body">
      <style:paragraph-properties fo:margin-left="0.238cm" fo:margin-right="0cm" fo:margin-top="0cm" fo:margin-bottom="0cm" style:contextual-spacing="false" fo:line-height="131%" fo:orphans="75" fo:widows="2" fo:text-indent="0cm" style:auto-text-indent="false" fo:padding="0cm" fo:border="none"/>
      <style:text-properties fo:font-variant="normal" fo:text-transform="none" fo:color="#000f33" loext:opacity="75%" style:font-name="TT Norms" fo:font-size="12pt" fo:letter-spacing="normal" fo:font-style="normal" fo:font-weight="normal" officeooo:rsid="0011c16f" style:font-size-asian="14pt" style:font-size-complex="14pt"/>
    </style:style>
    <style:style style:name="P36" style:family="paragraph" style:parent-style-name="Text_20_body" style:list-style-name="L9">
      <style:paragraph-properties fo:margin-left="0.238cm" fo:margin-right="0cm" fo:margin-top="0cm" fo:margin-bottom="0cm" style:contextual-spacing="false" fo:line-height="131%" fo:orphans="75" fo:widows="2" fo:text-indent="0cm" style:auto-text-indent="false" fo:padding="0cm" fo:border="none"/>
      <style:text-properties fo:color="#000f33" loext:opacity="75%" style:font-name="TT Norms" officeooo:rsid="0011c16f" style:font-size-asian="14pt" style:font-size-complex="14pt"/>
    </style:style>
    <style:style style:name="P37" style:family="paragraph" style:parent-style-name="Text_20_body" style:list-style-name="L10">
      <style:paragraph-properties fo:margin-left="0.238cm" fo:margin-right="0cm" fo:margin-top="0cm" fo:margin-bottom="0cm" style:contextual-spacing="false" fo:line-height="131%" fo:orphans="75" fo:widows="2" fo:text-indent="0cm" style:auto-text-indent="false" fo:padding="0cm" fo:border="none"/>
      <style:text-properties fo:color="#000f33" loext:opacity="75%" style:font-name="TT Norms" officeooo:rsid="0011c16f" style:font-size-asian="14pt" style:font-size-complex="14pt"/>
    </style:style>
    <style:style style:name="P38" style:family="paragraph" style:parent-style-name="Standard">
      <style:text-properties officeooo:paragraph-rsid="0013d8b4"/>
    </style:style>
    <style:style style:name="P39" style:family="paragraph" style:parent-style-name="Text_20_body">
      <style:text-properties officeooo:paragraph-rsid="0013d8b4"/>
    </style:style>
    <style:style style:name="P40" style:family="paragraph" style:parent-style-name="Text_20_body" style:list-style-name="L11">
      <style:paragraph-properties fo:margin-left="0.238cm" fo:margin-right="0cm" fo:margin-top="0cm" fo:margin-bottom="0.238cm" style:contextual-spacing="false" fo:line-height="131%" fo:orphans="75" fo:widows="2" fo:text-indent="0cm" style:auto-text-indent="false" fo:padding="0cm" fo:border="none"/>
      <style:text-properties fo:font-variant="normal" fo:text-transform="none" fo:color="#000000" loext:opacity="100%" style:font-name="Times New Roman" fo:font-size="14pt" fo:letter-spacing="normal" fo:font-style="normal" fo:font-weight="normal" officeooo:rsid="0013d8b4" fo:background-color="#ffffff" style:font-size-asian="14pt" style:font-style-asian="normal" style:font-size-complex="14pt" style:font-style-complex="normal"/>
    </style:style>
    <style:style style:name="P41" style:family="paragraph" style:parent-style-name="Text_20_body" style:list-style-name="L12">
      <style:paragraph-properties fo:margin-left="0.238cm" fo:margin-right="0cm" fo:margin-top="0cm" fo:margin-bottom="0.238cm" style:contextual-spacing="false" fo:line-height="131%" fo:orphans="75" fo:widows="2" fo:text-indent="0cm" style:auto-text-indent="false" fo:padding="0cm" fo:border="none"/>
      <style:text-properties fo:font-variant="normal" fo:text-transform="none" fo:color="#000000" loext:opacity="100%" style:font-name="Times New Roman" fo:font-size="14pt" fo:letter-spacing="normal" fo:font-style="normal" fo:font-weight="normal" officeooo:rsid="0013d8b4" fo:background-color="#ffffff" style:font-size-asian="14pt" style:font-style-asian="normal" style:font-size-complex="14pt" style:font-style-complex="normal"/>
    </style:style>
    <style:style style:name="P42" style:family="paragraph" style:parent-style-name="Text_20_body">
      <style:paragraph-properties fo:margin-left="0cm" fo:margin-right="0cm" fo:margin-top="0cm" fo:margin-bottom="0cm" style:contextual-spacing="false" fo:line-height="131%" fo:orphans="2" fo:widows="2" fo:text-indent="0cm" style:auto-text-indent="false" fo:padding="0cm" fo:border="none"/>
      <style:text-properties fo:font-variant="normal" fo:text-transform="none" fo:color="#000000" loext:opacity="100%" style:font-name="Times New Roman" fo:font-size="14pt" fo:letter-spacing="normal" fo:font-style="normal" fo:font-weight="normal" officeooo:rsid="0013d8b4" fo:background-color="#ffffff" style:font-size-asian="14pt" style:font-style-asian="normal" style:font-size-complex="14pt" style:font-style-complex="normal"/>
    </style:style>
    <style:style style:name="P43" style:family="paragraph" style:parent-style-name="Text_20_body" style:list-style-name="L13">
      <style:paragraph-properties fo:margin-left="0.238cm" fo:margin-right="0cm" fo:margin-top="0cm" fo:margin-bottom="0.238cm" style:contextual-spacing="false" fo:line-height="131%" fo:orphans="75" fo:widows="2" fo:text-indent="0cm" style:auto-text-indent="false" fo:padding="0cm" fo:border="none"/>
      <style:text-properties fo:font-variant="normal" fo:text-transform="none" fo:color="#000000" loext:opacity="100%" style:font-name="Times New Roman" fo:font-size="14pt" fo:letter-spacing="normal" fo:font-style="normal" fo:font-weight="normal" officeooo:rsid="0013d8b4" fo:background-color="#ffffff" style:font-size-asian="14pt" style:font-style-asian="normal" style:font-size-complex="14pt" style:font-style-complex="normal"/>
    </style:style>
    <style:style style:name="P44" style:family="paragraph" style:parent-style-name="Standard">
      <style:text-properties officeooo:paragraph-rsid="0015bd28"/>
    </style:style>
    <style:style style:name="P45" style:family="paragraph" style:parent-style-name="Text_20_body">
      <style:text-properties officeooo:paragraph-rsid="0015bd28"/>
    </style:style>
    <style:style style:name="P46" style:family="paragraph" style:parent-style-name="Text_20_body">
      <style:paragraph-properties fo:margin-left="0cm" fo:margin-right="0cm" fo:orphans="2" fo:widows="2" fo:text-indent="0cm" style:auto-text-indent="false"/>
      <style:text-properties fo:font-variant="normal" fo:text-transform="none" fo:color="#000000" loext:opacity="100%" style:font-name="Times New Roman" fo:font-size="14pt" fo:letter-spacing="normal" fo:font-style="normal" fo:font-weight="normal" officeooo:rsid="0015bd28" fo:background-color="#ffffff" style:font-size-asian="14pt" style:font-style-asian="normal" style:font-size-complex="14pt" style:font-style-complex="normal"/>
    </style:style>
    <style:style style:name="P47" style:family="paragraph" style:parent-style-name="Text_20_body" style:list-style-name="L14">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Times New Roman" fo:font-size="14pt" fo:letter-spacing="normal" fo:font-style="normal" fo:font-weight="normal" officeooo:rsid="0015bd28" fo:background-color="#ffffff" style:font-size-asian="14pt" style:font-style-asian="normal" style:font-size-complex="14pt" style:font-style-complex="normal"/>
    </style:style>
    <style:style style:name="P48" style:family="paragraph" style:parent-style-name="Text_20_body">
      <style:paragraph-properties fo:margin-left="0cm" fo:margin-right="0cm" fo:margin-top="0cm" fo:margin-bottom="0cm" style:contextual-spacing="false" fo:text-indent="0cm" style:auto-text-indent="false" fo:padding="0cm" fo:border="none"/>
      <style:text-properties fo:color="#000000" loext:opacity="100%" style:font-name="Times New Roman" fo:font-size="14pt" fo:font-style="normal" officeooo:rsid="0015bd28" fo:background-color="#ffffff" style:font-size-asian="14pt" style:font-style-asian="normal" style:font-size-complex="14pt" style:font-style-complex="normal" loext:padding="0cm" loext:border="none"/>
    </style:style>
    <style:style style:name="P49" style:family="paragraph" style:parent-style-name="Text_20_body">
      <style:paragraph-properties fo:margin-left="0cm" fo:margin-right="0cm" fo:text-indent="0cm" style:auto-text-indent="false"/>
    </style:style>
    <style:style style:name="P50" style:family="paragraph" style:parent-style-name="Text_20_body" style:list-style-name="L15">
      <style:paragraph-properties fo:margin-left="0cm" fo:margin-right="0cm" fo:margin-top="0cm" fo:margin-bottom="0cm" style:contextual-spacing="false" fo:text-indent="0cm" style:auto-text-indent="false"/>
      <style:text-properties style:font-name="Times New Roman" fo:font-size="14pt" officeooo:rsid="0015bd28" style:font-size-asian="14pt" style:font-size-complex="14pt"/>
    </style:style>
    <style:style style:name="P51" style:family="paragraph" style:parent-style-name="Text_20_body" style:list-style-name="L15">
      <style:paragraph-properties fo:margin-left="0cm" fo:margin-right="0cm" fo:text-indent="0cm" style:auto-text-indent="false"/>
      <style:text-properties style:font-name="Times New Roman" fo:font-size="14pt" officeooo:rsid="0015bd28" style:font-size-asian="14pt" style:font-size-complex="14pt"/>
    </style:style>
    <style:style style:name="P52" style:family="paragraph" style:parent-style-name="Text_20_body">
      <style:paragraph-properties fo:margin-left="0cm" fo:margin-right="0cm" fo:text-indent="0cm" style:auto-text-indent="false"/>
      <style:text-properties officeooo:paragraph-rsid="00176b30"/>
    </style:style>
    <style:style style:name="P53" style:family="paragraph" style:parent-style-name="Text_20_body">
      <style:paragraph-properties fo:margin-left="0cm" fo:margin-right="0cm" fo:text-indent="0cm" style:auto-text-indent="false"/>
      <style:text-properties fo:color="#000000" loext:opacity="100%" style:font-name="Times New Roman" fo:font-size="14pt" fo:font-style="normal" officeooo:rsid="00176b30" fo:background-color="#ffffff" style:font-size-asian="14pt" style:font-style-asian="normal" style:font-size-complex="14pt" style:font-style-complex="normal"/>
    </style:style>
    <style:style style:name="P54" style:family="paragraph" style:parent-style-name="Text_20_body">
      <style:paragraph-properties fo:margin-left="0cm" fo:margin-right="0cm" fo:text-indent="0cm" style:auto-text-indent="false"/>
      <style:text-properties officeooo:paragraph-rsid="001a178e"/>
    </style:style>
    <style:style style:name="P55" style:family="paragraph" style:parent-style-name="Text_20_body">
      <style:paragraph-properties fo:margin-left="0cm" fo:margin-right="0cm" fo:margin-top="0cm" fo:margin-bottom="0cm" style:contextual-spacing="false" fo:text-indent="0cm" style:auto-text-indent="false" fo:padding="0cm" fo:border="none"/>
      <style:text-properties fo:color="#000000" loext:opacity="100%" style:font-name="Times New Roman" fo:font-size="14pt" fo:font-style="normal" fo:background-color="#ffffff" style:font-size-asian="14pt" style:font-style-asian="normal" style:font-size-complex="14pt" style:font-style-complex="normal"/>
    </style:style>
    <style:style style:name="P56" style:family="paragraph" style:parent-style-name="Heading_20_2">
      <style:paragraph-properties fo:margin-left="0cm" fo:margin-right="0cm" fo:text-indent="0cm" style:auto-text-indent="false"/>
      <style:text-properties officeooo:paragraph-rsid="001a178e"/>
    </style:style>
    <style:style style:name="P57" style:family="paragraph" style:parent-style-name="Text_20_body">
      <style:text-properties style:font-name="Times New Roman" fo:font-size="14pt" officeooo:rsid="001a178e" style:font-size-asian="14pt" style:font-size-complex="14pt"/>
    </style:style>
    <style:style style:name="P58" style:family="paragraph" style:parent-style-name="Text_20_body">
      <style:paragraph-properties fo:margin-left="0cm" fo:margin-right="0cm" fo:text-indent="0cm" style:auto-text-indent="false"/>
      <style:text-properties officeooo:paragraph-rsid="001a55e3"/>
    </style:style>
    <style:style style:name="P59" style:family="paragraph" style:parent-style-name="Text_20_body" style:list-style-name="L16">
      <style:paragraph-properties fo:margin-left="0cm" fo:margin-right="0cm" fo:margin-top="0cm" fo:margin-bottom="0cm" style:contextual-spacing="false" fo:text-indent="0cm" style:auto-text-indent="false" fo:padding="0cm" fo:border="none"/>
      <style:text-properties style:font-name="Times New Roman" fo:font-size="14pt" officeooo:rsid="001a55e3" style:font-size-asian="14pt" style:font-size-complex="14pt"/>
    </style:style>
    <style:style style:name="P60" style:family="paragraph" style:parent-style-name="Text_20_body" style:list-style-name="L16">
      <style:paragraph-properties fo:margin-left="0cm" fo:margin-right="0cm" fo:text-indent="0cm" style:auto-text-indent="false" fo:padding="0cm" fo:border="none"/>
      <style:text-properties style:font-name="Times New Roman" fo:font-size="14pt" officeooo:rsid="001a55e3" style:font-size-asian="14pt" style:font-size-complex="14pt"/>
    </style:style>
    <style:style style:name="P61" style:family="paragraph" style:parent-style-name="Heading_20_3">
      <style:paragraph-properties fo:margin-left="0cm" fo:margin-right="0cm" fo:text-indent="0cm" style:auto-text-indent="false"/>
      <style:text-properties officeooo:paragraph-rsid="001c2ce5"/>
    </style:style>
    <style:style style:name="P62" style:family="paragraph" style:parent-style-name="Text_20_body">
      <style:paragraph-properties fo:margin-left="0cm" fo:margin-right="0cm" fo:text-indent="0cm" style:auto-text-indent="false"/>
      <style:text-properties officeooo:paragraph-rsid="001c2ce5"/>
    </style:style>
    <style:style style:name="P63"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style:font-name="Times New Roman" fo:font-size="14pt" fo:font-weight="bold" officeooo:rsid="001c2ce5" style:font-size-asian="14pt" style:font-weight-asian="bold" style:font-size-complex="14pt" style:font-weight-complex="bold"/>
    </style:style>
    <style:style style:name="P64" style:family="paragraph" style:parent-style-name="Text_20_body">
      <style:paragraph-properties fo:margin-left="0cm" fo:margin-right="0cm" fo:text-indent="0cm" style:auto-text-indent="false"/>
      <style:text-properties officeooo:paragraph-rsid="001f5b4f"/>
    </style:style>
    <style:style style:name="P65" style:family="paragraph" style:parent-style-name="Text_20_body">
      <style:paragraph-properties fo:margin-left="0cm" fo:margin-right="0cm" fo:text-indent="0cm" style:auto-text-indent="false"/>
      <style:text-properties fo:color="#000000" loext:opacity="100%" style:font-name="Times New Roman" fo:font-size="14pt" fo:font-style="normal" fo:font-weight="bold" officeooo:paragraph-rsid="001a178e" fo:background-color="#ffffff" style:font-size-asian="14pt" style:font-style-asian="normal" style:font-weight-asian="bold" style:font-size-complex="14pt" style:font-style-complex="normal" style:font-weight-complex="bold"/>
    </style:style>
    <style:style style:name="P66" style:family="paragraph" style:parent-style-name="Text_20_body">
      <style:paragraph-properties fo:margin-left="0cm" fo:margin-right="0cm" fo:text-indent="0cm" style:auto-text-indent="false"/>
      <style:text-properties fo:color="#000000" loext:opacity="100%" style:font-name="Times New Roman" fo:font-size="14pt" fo:font-style="normal" officeooo:paragraph-rsid="001a178e" fo:background-color="#ffffff" style:font-size-asian="14pt" style:font-style-asian="normal" style:font-size-complex="14pt" style:font-style-complex="normal"/>
    </style:style>
    <style:style style:name="P67" style:family="paragraph" style:parent-style-name="Text_20_body" style:list-style-name="L17">
      <style:text-properties fo:color="#000000" loext:opacity="100%" style:font-name="Times New Roman" fo:font-size="14pt" fo:font-style="normal" fo:background-color="#ffffff" style:font-size-asian="14pt" style:font-style-asian="normal" style:font-size-complex="14pt" style:font-style-complex="normal"/>
    </style:style>
    <style:style style:name="P68" style:family="paragraph" style:parent-style-name="Heading_20_3">
      <style:paragraph-properties fo:margin-left="0cm" fo:margin-right="0cm" fo:text-indent="0cm" style:auto-text-indent="false"/>
      <style:text-properties fo:color="#000000" loext:opacity="100%" style:font-name="Times New Roman" fo:font-size="14pt" fo:font-style="normal" officeooo:paragraph-rsid="00211fce" fo:background-color="#ffffff" style:font-size-asian="14pt" style:font-style-asian="normal" style:font-size-complex="14pt" style:font-style-complex="normal"/>
    </style:style>
    <style:style style:name="P69" style:family="paragraph" style:parent-style-name="Heading_20_3">
      <style:paragraph-properties fo:margin-left="0cm" fo:margin-right="0cm" fo:text-indent="0cm" style:auto-text-indent="false"/>
      <style:text-properties fo:color="#000000" loext:opacity="100%" style:font-name="Times New Roman" fo:font-size="14pt" fo:font-style="normal" fo:font-weight="normal" officeooo:paragraph-rsid="00211fce" fo:background-color="#ffffff" style:font-size-asian="14pt" style:font-style-asian="normal" style:font-weight-asian="normal" style:font-size-complex="14pt" style:font-style-complex="normal" style:font-weight-complex="normal"/>
    </style:style>
    <style:style style:name="P70" style:family="paragraph" style:parent-style-name="Text_20_body">
      <style:paragraph-properties fo:margin-left="0cm" fo:margin-right="0cm" fo:text-indent="0cm" style:auto-text-indent="false"/>
      <style:text-properties fo:font-weight="normal" officeooo:paragraph-rsid="00211fce" style:font-weight-asian="normal" style:font-weight-complex="normal"/>
    </style:style>
    <style:style style:name="P71" style:family="paragraph" style:parent-style-name="Text_20_body">
      <style:paragraph-properties fo:margin-left="0cm" fo:margin-right="0cm" fo:text-indent="0cm" style:auto-text-indent="false"/>
      <style:text-properties fo:font-variant="normal" fo:text-transform="none" fo:color="#000000" loext:opacity="100%" style:font-name="Times New Roman" fo:font-size="14pt" fo:letter-spacing="normal" fo:font-style="normal" fo:font-weight="normal" officeooo:paragraph-rsid="00211fce" fo:background-color="#ffffff" style:font-size-asian="14pt" style:font-style-asian="normal" style:font-weight-asian="normal" style:font-size-complex="14pt" style:font-style-complex="normal" style:font-weight-complex="normal"/>
    </style:style>
    <style:style style:name="P72" style:family="paragraph" style:parent-style-name="Text_20_body">
      <style:paragraph-properties fo:margin-left="0cm" fo:margin-right="0cm" fo:text-indent="0cm" style:auto-text-indent="false"/>
      <style:text-properties fo:color="#000000" loext:opacity="100%" style:font-name="Times New Roman" fo:font-size="14pt" fo:font-style="normal" fo:font-weight="normal" officeooo:paragraph-rsid="00211fce" fo:background-color="#ffffff" style:font-size-asian="14pt" style:font-style-asian="normal" style:font-weight-asian="normal" style:font-size-complex="14pt" style:font-style-complex="normal" style:font-weight-complex="normal"/>
    </style:style>
    <style:style style:name="P73" style:family="paragraph" style:parent-style-name="Heading_20_2">
      <style:paragraph-properties fo:margin-left="0cm" fo:margin-right="0cm" fo:text-indent="0cm" style:auto-text-indent="false"/>
      <style:text-properties fo:color="#000000" loext:opacity="100%" style:font-name="Times New Roman" fo:font-size="14pt" fo:font-style="normal" fo:font-weight="bold" officeooo:paragraph-rsid="00211fce" fo:background-color="#ffffff" style:font-size-asian="14pt" style:font-style-asian="normal" style:font-weight-asian="normal" style:font-size-complex="14pt" style:font-style-complex="normal" style:font-weight-complex="normal"/>
    </style:style>
    <style:style style:name="P74" style:family="paragraph" style:parent-style-name="Text_20_body" style:list-style-name="L18">
      <style:text-properties fo:color="#000000" loext:opacity="100%" style:font-name="Times New Roman" fo:font-size="14pt" fo:font-style="normal" fo:background-color="#ffffff" style:font-size-asian="14pt" style:font-style-asian="normal" style:font-size-complex="14pt" style:font-style-complex="normal"/>
    </style:style>
    <style:style style:name="P75" style:family="paragraph" style:parent-style-name="Heading_20_3">
      <style:paragraph-properties fo:margin-left="0cm" fo:margin-right="0cm" fo:text-indent="0cm" style:auto-text-indent="false"/>
      <style:text-properties fo:color="#000000" loext:opacity="100%" style:font-name="Times New Roman" fo:font-size="14pt" fo:font-style="normal" officeooo:paragraph-rsid="001a178e" fo:background-color="#ffffff" style:font-size-asian="14pt" style:font-style-asian="normal" style:font-size-complex="14pt" style:font-style-complex="normal"/>
    </style:style>
    <style:style style:name="P76" style:family="paragraph" style:parent-style-name="Text_20_body">
      <style:text-properties fo:color="#000000" loext:opacity="100%" style:font-name="Times New Roman" fo:font-size="14pt" fo:font-style="normal" officeooo:paragraph-rsid="00227a1b" fo:background-color="#ffffff" style:font-size-asian="14pt" style:font-style-asian="normal" style:font-size-complex="14pt" style:font-style-complex="normal"/>
    </style:style>
    <style:style style:name="P77" style:family="paragraph" style:parent-style-name="Heading_20_2">
      <style:text-properties fo:color="#000000" loext:opacity="100%" style:font-name="Times New Roman" fo:font-size="14pt" fo:font-style="normal" officeooo:paragraph-rsid="00227a1b" fo:background-color="#ffffff" style:font-size-asian="14pt" style:font-style-asian="normal" style:font-size-complex="14pt" style:font-style-complex="normal"/>
    </style:style>
    <style:style style:name="P78" style:family="paragraph" style:parent-style-name="Text_20_body" style:list-style-name="L19">
      <style:paragraph-properties fo:margin-left="0cm" fo:margin-right="0cm" fo:margin-top="0cm" fo:margin-bottom="0cm" style:contextual-spacing="false" fo:text-indent="0cm" style:auto-text-indent="false" fo:padding="0cm" fo:border="none"/>
    </style:style>
    <style:style style:name="P79" style:family="paragraph" style:parent-style-name="Heading_20_2">
      <style:text-properties officeooo:paragraph-rsid="00227a1b"/>
    </style:style>
    <style:style style:name="P80" style:family="paragraph" style:parent-style-name="Heading_20_3">
      <style:text-properties fo:font-variant="normal" fo:text-transform="none" fo:color="#000000" loext:opacity="100%" style:font-name="Times New Roman" fo:font-size="14pt" fo:letter-spacing="normal" fo:font-style="normal" fo:font-weight="normal" officeooo:paragraph-rsid="00227a1b" fo:background-color="#ffffff" style:font-size-asian="14pt" style:font-style-asian="normal" style:font-size-complex="14pt" style:font-style-complex="normal"/>
    </style:style>
    <style:style style:name="P81" style:family="paragraph" style:parent-style-name="Text_20_body">
      <style:paragraph-properties fo:margin-left="0cm" fo:margin-right="0cm" fo:margin-top="0cm" fo:margin-bottom="0.247cm" style:contextual-spacing="false" fo:text-align="start" style:justify-single-word="false" fo:orphans="2" fo:widows="2" fo:text-indent="0cm" style:auto-text-indent="false"/>
      <style:text-properties fo:font-variant="normal" fo:text-transform="none" fo:color="#000000" loext:opacity="100%" style:font-name="Times New Roman" fo:font-size="14pt" fo:letter-spacing="normal" fo:font-style="normal" fo:font-weight="normal" fo:background-color="#ffffff" style:font-size-asian="14pt" style:font-style-asian="normal" style:font-size-complex="14pt" style:font-style-complex="normal"/>
    </style:style>
    <style:style style:name="P82" style:family="paragraph" style:parent-style-name="Heading_20_3">
      <style:paragraph-properties fo:margin-left="0cm" fo:margin-right="0cm" fo:margin-top="0cm" fo:margin-bottom="0.247cm" style:contextual-spacing="false" style:line-height-at-least="1.693cm" fo:text-align="start" style:justify-single-word="false" fo:orphans="2" fo:widows="2" fo:text-indent="0cm" style:auto-text-indent="false"/>
      <style:text-properties fo:font-variant="normal" fo:text-transform="none" fo:color="#000000" loext:opacity="100%" style:font-name="Times New Roman" fo:font-size="14pt" fo:letter-spacing="normal" fo:font-style="normal" fo:font-weight="normal" fo:background-color="#ffffff" style:font-size-asian="14pt" style:font-style-asian="normal" style:font-size-complex="14pt" style:font-style-complex="normal"/>
    </style:style>
    <style:style style:name="P83" style:family="paragraph" style:parent-style-name="Text_20_body">
      <style:paragraph-properties fo:margin-left="0cm" fo:margin-right="0cm" fo:margin-top="0cm" fo:margin-bottom="0.247cm" style:contextual-spacing="false" fo:text-align="start" style:justify-single-word="false" fo:orphans="2" fo:widows="2" fo:text-indent="0cm" style:auto-text-indent="false"/>
    </style:style>
    <style:style style:name="P84" style:family="paragraph" style:parent-style-name="Heading_20_4">
      <style:paragraph-properties fo:margin-left="0cm" fo:margin-right="0cm" fo:margin-top="0cm" fo:margin-bottom="0.247cm" style:contextual-spacing="false" style:line-height-at-least="1.058cm" fo:text-align="start" style:justify-single-word="false" fo:orphans="2" fo:widows="2" fo:text-indent="0cm" style:auto-text-indent="false"/>
    </style:style>
    <style:style style:name="P85" style:family="paragraph" style:parent-style-name="Table_20_Contents">
      <style:paragraph-properties fo:margin-left="0cm" fo:margin-right="0cm" fo:text-indent="0cm" style:auto-text-indent="false"/>
    </style:style>
    <style:style style:name="P86" style:family="paragraph" style:parent-style-name="Table_20_Contents">
      <style:paragraph-properties fo:margin-left="0cm" fo:margin-right="0cm" fo:text-indent="0cm" style:auto-text-indent="false"/>
      <style:text-properties fo:color="#000000" loext:opacity="100%" style:font-name="Times New Roman" fo:font-size="14pt" fo:font-style="normal" fo:background-color="#ffffff" style:font-size-asian="14pt" style:font-style-asian="normal" style:font-size-complex="14pt" style:font-style-complex="normal"/>
    </style:style>
    <style:style style:name="P87" style:family="paragraph" style:parent-style-name="Table_20_Contents">
      <style:text-properties fo:color="#000000" loext:opacity="100%" style:font-name="Times New Roman" fo:font-size="14pt" fo:font-style="normal" fo:background-color="#ffffff" style:font-size-asian="14pt" style:font-style-asian="normal" style:font-size-complex="14pt" style:font-style-complex="normal"/>
    </style:style>
    <style:style style:name="P88" style:family="paragraph" style:parent-style-name="Text_20_body">
      <style:text-properties fo:color="#000000" loext:opacity="100%" style:font-name="Times New Roman" fo:font-size="14pt" fo:font-style="normal" fo:font-weight="bold" officeooo:rsid="002c1a39" officeooo:paragraph-rsid="002c1a39" fo:background-color="#ffffff" style:font-size-asian="14pt" style:font-style-asian="normal" style:font-weight-asian="bold" style:font-size-complex="14pt" style:font-style-complex="normal" style:font-weight-complex="bold"/>
    </style:style>
    <style:style style:name="P89" style:family="paragraph" style:parent-style-name="Text_20_body">
      <style:paragraph-properties fo:margin-left="0cm" fo:margin-right="0cm" fo:margin-top="0cm" fo:margin-bottom="0cm" style:contextual-spacing="false" fo:orphans="2" fo:widows="2" fo:text-indent="0cm" style:auto-text-indent="false"/>
    </style:style>
    <style:style style:name="P90" style:family="paragraph" style:parent-style-name="Text_20_body">
      <style:paragraph-properties fo:margin-left="0cm" fo:margin-right="0cm" fo:margin-top="0cm" fo:margin-bottom="0.247cm" style:contextual-spacing="false" fo:orphans="2" fo:widows="2" fo:text-indent="0cm" style:auto-text-indent="false"/>
      <style:text-properties fo:font-variant="normal" fo:text-transform="none" fo:color="#212529" loext:opacity="100%" style:font-name="Poppins" fo:font-size="12pt" fo:letter-spacing="normal" fo:font-style="normal" fo:font-weight="normal"/>
    </style:style>
    <style:style style:name="P91" style:family="paragraph" style:parent-style-name="Text_20_body">
      <style:paragraph-properties fo:margin-left="0cm" fo:margin-right="0cm" fo:orphans="2" fo:widows="2" fo:text-indent="0cm" style:auto-text-indent="false"/>
      <style:text-properties fo:color="#212529" loext:opacity="100%" style:font-name="Poppins"/>
    </style:style>
    <style:style style:name="P92" style:family="paragraph" style:parent-style-name="Text_20_body">
      <style:paragraph-properties fo:margin-left="0cm" fo:margin-right="0cm" fo:orphans="2" fo:widows="2" fo:text-indent="0cm" style:auto-text-indent="false" style:writing-mode="lr-tb"/>
      <style:text-properties fo:color="#212529" loext:opacity="100%" style:font-name="Poppins"/>
    </style:style>
    <style:style style:name="P93" style:family="paragraph" style:parent-style-name="Text_20_body">
      <style:paragraph-properties fo:margin-left="0cm" fo:margin-right="0cm" fo:orphans="2" fo:widows="2" fo:text-indent="0cm" style:auto-text-indent="false"/>
      <style:text-properties fo:font-variant="normal" fo:text-transform="none" fo:color="#000000" loext:opacity="100%" style:font-name="Times New Roman" fo:font-size="14pt" fo:letter-spacing="normal" fo:font-style="normal" fo:font-weight="normal" fo:background-color="#ffffff" style:font-size-asian="14pt" style:font-style-asian="normal" style:font-size-complex="14pt" style:font-style-complex="normal"/>
    </style:style>
    <style:style style:name="P94" style:family="paragraph" style:parent-style-name="Text_20_body" style:list-style-name="L20">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Times New Roman" fo:font-size="14pt" fo:letter-spacing="normal" fo:font-style="normal" fo:font-weight="normal" fo:background-color="#ffffff" style:font-size-asian="14pt" style:font-style-asian="normal" style:font-size-complex="14pt" style:font-style-complex="normal"/>
    </style:style>
    <style:style style:name="P95" style:family="paragraph" style:parent-style-name="Heading_20_2">
      <style:paragraph-properties fo:margin-left="0cm" fo:margin-right="0cm" fo:margin-top="0cm" fo:margin-bottom="0.247cm" style:contextual-spacing="false" fo:orphans="2" fo:widows="2" fo:text-indent="0cm" style:auto-text-indent="false"/>
      <style:text-properties fo:font-variant="normal" fo:text-transform="none" fo:color="#232f3e" loext:opacity="100%" style:font-name="Times New Roman" fo:font-size="14pt" fo:letter-spacing="normal" fo:font-style="normal" fo:font-weight="bold" fo:background-color="#ffffff" style:font-size-asian="14pt" style:font-style-asian="normal" style:font-weight-asian="bold" style:font-size-complex="14pt" style:font-style-complex="normal" style:font-weight-complex="bold"/>
    </style:style>
    <style:style style:name="P96" style:family="paragraph" style:parent-style-name="Text_20_body">
      <style:paragraph-properties fo:margin-left="0cm" fo:margin-right="0cm" fo:margin-top="0cm" fo:margin-bottom="0cm" style:contextual-spacing="false" fo:line-height="160%" fo:orphans="2" fo:widows="2" fo:text-indent="0cm" style:auto-text-indent="false"/>
      <style:text-properties fo:font-variant="normal" fo:text-transform="none" fo:color="#333333" loext:opacity="100%" style:font-name="Times New Roman" fo:font-size="14pt" fo:letter-spacing="normal" fo:font-style="normal" fo:font-weight="normal" fo:background-color="#ffffff" style:font-size-asian="14pt" style:font-size-complex="14pt"/>
    </style:style>
    <style:style style:name="P97" style:family="paragraph" style:parent-style-name="Text_20_body">
      <style:paragraph-properties fo:margin-left="0cm" fo:margin-right="0cm" fo:margin-top="0cm" fo:margin-bottom="0cm" style:contextual-spacing="false" fo:line-height="160%" fo:orphans="2" fo:widows="2" fo:text-indent="0cm" style:auto-text-indent="false"/>
      <style:text-properties fo:font-variant="normal" fo:text-transform="none" fo:color="#333333" loext:opacity="100%" style:font-name="Times New Roman" fo:font-size="14pt" fo:letter-spacing="normal" fo:font-style="normal" fo:font-weight="normal" officeooo:rsid="002dba87" officeooo:paragraph-rsid="002dba87" fo:background-color="#ffffff" style:font-size-asian="14pt" style:font-size-complex="14pt"/>
    </style:style>
    <style:style style:name="P98" style:family="paragraph" style:parent-style-name="Heading_20_3">
      <style:paragraph-properties fo:margin-left="0cm" fo:margin-right="0cm" fo:margin-top="0cm" fo:margin-bottom="0.247cm" style:contextual-spacing="false" fo:orphans="2" fo:widows="2" fo:text-indent="0cm" style:auto-text-indent="false"/>
      <style:text-properties fo:font-variant="normal" fo:text-transform="none" fo:color="#000000" loext:opacity="100%" style:font-name="Times New Roman" fo:font-size="14pt" fo:letter-spacing="normal" fo:font-style="normal" fo:font-weight="normal" fo:background-color="#ffffff" style:font-size-asian="14pt" style:font-style-asian="normal" style:font-size-complex="14pt" style:font-style-complex="normal"/>
    </style:style>
    <style:style style:name="P99" style:family="paragraph" style:parent-style-name="Text_20_body">
      <style:paragraph-properties fo:margin-left="0cm" fo:margin-right="0cm" fo:margin-top="0.397cm" fo:margin-bottom="0.397cm" style:contextual-spacing="false" fo:orphans="2" fo:widows="2" fo:text-indent="0cm" style:auto-text-indent="false"/>
      <style:text-properties fo:font-variant="normal" fo:text-transform="none" fo:color="#333333" loext:opacity="100%" style:font-name="Times New Roman" fo:font-size="14pt" fo:letter-spacing="normal" fo:font-style="normal" fo:font-weight="normal" fo:background-color="#ffffff" style:font-size-asian="14pt" style:font-size-complex="14pt"/>
    </style:style>
    <style:style style:name="P100" style:family="paragraph" style:parent-style-name="Heading_20_3">
      <style:paragraph-properties fo:margin-left="0cm" fo:margin-right="0cm" fo:margin-top="0cm" fo:margin-bottom="0.247cm" style:contextual-spacing="false" fo:line-height="115%" fo:orphans="2" fo:widows="2" fo:text-indent="0cm" style:auto-text-indent="false"/>
      <style:text-properties fo:color="#000000" loext:opacity="100%" style:font-name="Times New Roman" fo:font-weight="normal" fo:background-color="#ffffff"/>
    </style:style>
    <style:style style:name="P101" style:family="paragraph" style:parent-style-name="Text_20_body">
      <style:paragraph-properties fo:margin-left="0cm" fo:margin-right="0cm" fo:margin-top="0.397cm" fo:margin-bottom="0cm" style:contextual-spacing="false" fo:orphans="2" fo:widows="2" fo:text-indent="0cm" style:auto-text-indent="false"/>
      <style:text-properties fo:font-variant="normal" fo:text-transform="none" fo:color="#333333" loext:opacity="100%" style:font-name="Times New Roman" fo:font-size="14pt" fo:letter-spacing="normal" fo:font-style="normal" fo:font-weight="normal" fo:background-color="#ffffff" style:font-size-asian="14pt" style:font-size-complex="14pt"/>
    </style:style>
    <style:style style:name="P102" style:family="paragraph" style:parent-style-name="Text_20_body">
      <style:paragraph-properties fo:margin-left="0cm" fo:margin-right="0cm" fo:margin-top="0cm" fo:margin-bottom="0.247cm" style:contextual-spacing="false" fo:orphans="2" fo:widows="2" fo:text-indent="0cm" style:auto-text-indent="false"/>
      <style:text-properties fo:font-variant="normal" fo:text-transform="none" fo:color="#000000" loext:opacity="100%" style:font-name="Times New Roman" fo:font-size="14pt" fo:letter-spacing="normal" fo:font-style="normal" fo:font-weight="normal" fo:background-color="#ffffff" style:font-size-asian="14pt" style:font-style-asian="normal" style:font-size-complex="14pt" style:font-style-complex="normal"/>
    </style:style>
    <style:style style:name="T1" style:family="text">
      <style:text-properties fo:color="#000000" loext:opacity="100%" style:font-name="Times New Roman" fo:font-size="14pt" fo:font-style="normal" fo:font-weight="normal" fo:background-color="#ffffff" loext:char-shading-value="0" style:font-size-asian="14pt" style:font-style-asian="normal" style:font-weight-asian="normal" style:font-size-complex="14pt" style:font-style-complex="normal" style:font-weight-complex="normal" loext:padding="0cm" loext:border="none"/>
    </style:style>
    <style:style style:name="T2" style:family="text">
      <style:text-properties fo:font-variant="normal" fo:text-transform="none" fo:color="#000000" loext:opacity="100%" style:font-name="Times New Roman" fo:font-size="14pt" fo:letter-spacing="normal" fo:font-style="normal" fo:font-weight="normal" fo:background-color="#ffffff" loext:char-shading-value="0" style:font-size-asian="14pt" style:font-style-asian="normal" style:font-weight-asian="normal" style:font-size-complex="14pt" style:font-style-complex="normal" style:font-weight-complex="normal"/>
    </style:style>
    <style:style style:name="T3" style:family="text">
      <style:text-properties fo:font-variant="normal" fo:text-transform="none" fo:letter-spacing="normal"/>
    </style:style>
    <style:style style:name="T4" style:family="text">
      <style:text-properties fo:font-variant="normal" fo:text-transform="none" fo:color="#000000" loext:opacity="100%" style:font-name="Times New Roman" fo:font-size="14pt" fo:font-style="normal" fo:font-weight="normal" officeooo:rsid="000b8d53" fo:background-color="#ffffff" loext:char-shading-value="0" style:font-size-asian="14pt" style:font-style-asian="normal" style:font-weight-asian="normal" style:font-size-complex="14pt" style:font-style-complex="normal" style:font-weight-complex="normal" loext:padding="0cm" loext:border="none"/>
    </style:style>
    <style:style style:name="T5" style:family="text">
      <style:text-properties fo:font-variant="normal" fo:text-transform="none" fo:color="#000000" loext:opacity="100%" style:font-name="Times New Roman" fo:font-size="14pt" fo:letter-spacing="normal" fo:font-style="normal" fo:font-weight="normal" fo:background-color="#ffffff" loext:char-shading-value="0" style:font-size-asian="14pt" style:font-style-asian="normal" style:font-weight-asian="normal" style:font-size-complex="14pt" style:font-style-complex="normal" style:font-weight-complex="normal" loext:padding="0cm" loext:border="none"/>
    </style:style>
    <style:style style:name="T6" style:family="text">
      <style:text-properties fo:font-variant="normal" fo:text-transform="none" fo:color="#000000" loext:opacity="100%" style:font-name="Times New Roman" fo:font-size="14pt" fo:font-style="normal" fo:font-weight="normal" fo:background-color="#ffffff" loext:char-shading-value="0" style:font-size-asian="14pt" style:font-style-asian="normal" style:font-weight-asian="normal" style:font-size-complex="14pt" style:font-style-complex="normal" style:font-weight-complex="normal" loext:padding="0cm" loext:border="none"/>
    </style:style>
    <style:style style:name="T7" style:family="text">
      <style:text-properties fo:font-variant="normal" fo:text-transform="none" fo:color="#000000" loext:opacity="100%" style:font-name="Times New Roman" fo:font-size="14pt" fo:font-style="normal" style:text-underline-style="solid" style:text-underline-width="auto" style:text-underline-color="font-color" fo:font-weight="normal" fo:background-color="#ffffff" loext:char-shading-value="0" style:font-size-asian="14pt" style:font-style-asian="normal" style:font-weight-asian="normal" style:font-size-complex="14pt" style:font-style-complex="normal" style:font-weight-complex="normal" loext:padding="0cm" loext:border="none"/>
    </style:style>
    <style:style style:name="T8" style:family="text">
      <style:text-properties fo:font-variant="normal" fo:text-transform="none" fo:color="#000000" loext:opacity="100%" style:font-name="Times New Roman" fo:font-size="14pt" fo:font-style="normal" fo:font-weight="normal" fo:background-color="#ffffff" loext:char-shading-value="0" style:font-size-asian="14pt" style:font-style-asian="normal" style:font-weight-asian="normal" style:font-style-complex="normal" style:font-weight-complex="normal" loext:padding="0cm" loext:border="none"/>
    </style:style>
    <style:style style:name="T9" style:family="text">
      <style:text-properties fo:font-variant="normal" fo:text-transform="none" fo:color="#000000" loext:opacity="100%" style:font-name="Times New Roman" fo:font-size="14pt" fo:font-style="normal" fo:font-weight="normal" fo:background-color="#ffffff" loext:char-shading-value="0" style:font-size-asian="14pt" style:font-style-asian="normal" style:font-weight-asian="normal" style:font-style-complex="normal" style:font-weight-complex="normal"/>
    </style:style>
    <style:style style:name="T10" style:family="text">
      <style:text-properties fo:font-variant="normal" fo:text-transform="none" fo:color="#000000" loext:opacity="100%" style:font-name="Times New Roman" fo:font-size="14pt" fo:font-style="normal" style:text-underline-style="solid" style:text-underline-width="auto" style:text-underline-color="font-color" fo:font-weight="normal" fo:background-color="#ffffff" loext:char-shading-value="0" style:font-size-asian="14pt" style:font-style-asian="normal" style:font-weight-asian="normal" style:font-style-complex="normal" style:font-weight-complex="normal" loext:padding="0cm" loext:border="none"/>
    </style:style>
    <style:style style:name="T11" style:family="text">
      <style:text-properties fo:font-variant="normal" fo:text-transform="none" fo:color="#000000" loext:opacity="100%" style:font-name="Times New Roman" fo:font-size="14pt" fo:font-style="normal" fo:font-weight="bold" officeooo:rsid="000b8d53" fo:background-color="#ffffff" loext:char-shading-value="0" style:font-size-asian="14pt" style:font-style-asian="normal" style:font-size-complex="14pt" style:font-style-complex="normal" loext:padding="0cm" loext:border="none"/>
    </style:style>
    <style:style style:name="T12" style:family="text">
      <style:text-properties fo:font-variant="normal" fo:text-transform="none" fo:color="#000000" loext:opacity="100%" style:font-name="Times New Roman" fo:font-style="normal" fo:font-weight="bold" fo:background-color="#ffffff" loext:char-shading-value="0" style:font-style-asian="normal" style:font-style-complex="normal" loext:padding="0cm" loext:border="none"/>
    </style:style>
    <style:style style:name="T13" style:family="text">
      <style:text-properties fo:font-variant="normal" fo:text-transform="none" fo:color="#000000" loext:opacity="100%" style:font-name="Times New Roman" fo:font-style="normal" fo:font-weight="normal" fo:background-color="#ffffff" loext:char-shading-value="0" style:font-style-asian="normal" style:font-style-complex="normal"/>
    </style:style>
    <style:style style:name="T14" style:family="text">
      <style:text-properties fo:font-variant="normal" fo:text-transform="none" fo:color="#000000" loext:opacity="100%" style:font-name="Times New Roman" fo:font-style="normal" style:text-underline-style="solid" style:text-underline-width="auto" style:text-underline-color="font-color" fo:font-weight="normal" fo:background-color="#ffffff" loext:char-shading-value="0" style:font-style-asian="normal" style:font-style-complex="normal" loext:padding="0cm" loext:border="none"/>
    </style:style>
    <style:style style:name="T15" style:family="text">
      <style:text-properties fo:font-variant="normal" fo:text-transform="none" fo:color="#000000" loext:opacity="100%" style:font-name="Times New Roman" fo:font-size="14pt" fo:letter-spacing="-0.026cm" fo:font-style="normal" fo:font-weight="bold" officeooo:rsid="000b8d53" fo:background-color="#ffffff" loext:char-shading-value="0" style:font-size-asian="14pt" style:font-style-asian="normal" style:font-weight-asian="normal" style:font-size-complex="14pt" style:font-style-complex="normal" style:font-weight-complex="normal" loext:padding="0cm" loext:border="none"/>
    </style:style>
    <style:style style:name="T16" style:family="text">
      <style:text-properties fo:font-variant="normal" fo:text-transform="none" fo:color="#000000" loext:opacity="100%" style:font-name="Times New Roman" fo:letter-spacing="normal" fo:font-style="normal" fo:font-weight="normal" fo:background-color="#ffffff" loext:char-shading-value="0" style:font-style-asian="normal" style:font-style-complex="normal" loext:padding="0cm" loext:border="none"/>
    </style:style>
    <style:style style:name="T17" style:family="text">
      <style:text-properties fo:font-variant="normal" fo:text-transform="none" fo:color="#000000" loext:opacity="100%" style:font-name="Times New Roman" fo:letter-spacing="normal" fo:font-style="normal" fo:font-weight="bold" fo:background-color="#ffffff" loext:char-shading-value="0" style:font-style-asian="normal" style:font-style-complex="normal" loext:padding="0cm" loext:border="none"/>
    </style:style>
    <style:style style:name="T18" style:family="text">
      <style:text-properties fo:font-variant="normal" fo:text-transform="none" fo:color="#000000" loext:opacity="100%" style:font-name="Times New Roman" fo:font-size="14pt" fo:letter-spacing="normal" fo:font-style="normal" fo:font-weight="normal" officeooo:rsid="000b8d53" fo:background-color="#ffffff" loext:char-shading-value="0" style:font-size-asian="14pt" style:font-style-asian="normal" style:font-weight-asian="normal" style:font-size-complex="14pt" style:font-style-complex="normal" style:font-weight-complex="normal" loext:padding="0cm" loext:border="none"/>
    </style:style>
    <style:style style:name="T19" style:family="text">
      <style:text-properties fo:font-variant="normal" fo:text-transform="none" fo:color="#000000" loext:opacity="100%" style:font-name="Times New Roman" fo:font-size="14pt" fo:letter-spacing="normal" fo:font-style="normal" fo:font-weight="normal" officeooo:rsid="000b8d53" fo:background-color="#ffffff" loext:char-shading-value="0" style:font-size-asian="14pt" style:font-style-asian="normal" style:font-size-complex="14pt" style:font-style-complex="normal"/>
    </style:style>
    <style:style style:name="T20" style:family="text">
      <style:text-properties fo:font-variant="normal" fo:text-transform="none" fo:color="#000000" loext:opacity="100%" style:text-line-through-style="none" style:text-line-through-type="none" style:font-name="Times New Roman" fo:font-size="14pt" fo:letter-spacing="normal" fo:font-style="normal" style:text-underline-style="none" fo:font-weight="normal" officeooo:rsid="000b8d53" style:text-blinking="false" fo:background-color="#ffffff" loext:char-shading-value="0" style:font-size-asian="14pt" style:font-style-asian="normal" style:font-size-complex="14pt" style:font-style-complex="normal"/>
    </style:style>
    <style:style style:name="T21" style:family="text">
      <style:text-properties fo:font-variant="normal" fo:text-transform="none" fo:color="#000080" loext:opacity="100%" style:text-line-through-style="none" style:text-line-through-type="none" style:font-name="Times New Roman" fo:font-size="14pt" fo:letter-spacing="normal" fo:font-style="normal" style:text-underline-style="solid" style:text-underline-width="auto" style:text-underline-color="font-color" fo:font-weight="normal" officeooo:rsid="000b8d53" style:text-blinking="false" fo:background-color="#ffffff" loext:char-shading-value="0" style:font-size-asian="14pt" style:font-style-asian="normal" style:font-size-complex="14pt" style:font-style-complex="normal"/>
    </style:style>
    <style:style style:name="T22" style:family="text">
      <style:text-properties fo:font-variant="normal" fo:text-transform="none" fo:color="#000000" loext:opacity="100%" style:text-line-through-style="none" style:text-line-through-type="none" style:font-name="Times New Roman" fo:font-size="14pt" fo:letter-spacing="normal" fo:font-style="normal" style:text-underline-style="none" fo:font-weight="normal" officeooo:rsid="000b8d53" fo:background-color="#ffffff" loext:char-shading-value="0" style:font-size-asian="14pt" style:font-style-asian="normal" style:font-weight-asian="normal" style:font-size-complex="14pt" style:font-style-complex="normal" style:font-weight-complex="normal" loext:padding="0cm" loext:border="none"/>
    </style:style>
    <style:style style:name="T23" style:family="text">
      <style:text-properties fo:font-variant="normal" fo:text-transform="none" fo:color="#000080" loext:opacity="100%" style:text-line-through-style="none" style:text-line-through-type="none" style:font-name="Times New Roman" fo:font-size="14pt" fo:letter-spacing="normal" fo:font-style="normal" style:text-underline-style="solid" style:text-underline-width="auto" style:text-underline-color="font-color" fo:font-weight="normal" officeooo:rsid="000b8d53" style:text-blinking="false" fo:background-color="#ffffff" loext:char-shading-value="0" style:font-size-asian="14pt" style:font-style-asian="normal" style:font-weight-asian="normal" style:font-size-complex="14pt" style:font-style-complex="normal" style:font-weight-complex="normal"/>
    </style:style>
    <style:style style:name="T24" style:family="text">
      <style:text-properties fo:font-variant="normal" fo:text-transform="none" fo:color="#000000" loext:opacity="100%" style:text-line-through-style="none" style:text-line-through-type="none" style:font-name="Times New Roman" fo:font-size="14pt" fo:letter-spacing="normal" fo:font-style="normal" style:text-underline-style="none" fo:font-weight="normal" officeooo:rsid="000b8d53" fo:background-color="#ffffff" loext:char-shading-value="0" style:font-size-asian="14pt" style:font-style-asian="normal" style:font-weight-asian="normal" style:font-size-complex="14pt" style:font-style-complex="normal" style:font-weight-complex="normal"/>
    </style:style>
    <style:style style:name="T25" style:family="text">
      <style:text-properties fo:font-variant="normal" fo:text-transform="none" fo:color="#000000" loext:opacity="100%" style:font-name="Times New Roman" fo:font-size="14pt" fo:letter-spacing="normal" fo:font-style="normal" style:text-underline-style="none" fo:font-weight="normal" officeooo:rsid="000b8d53" fo:background-color="#ffffff" loext:char-shading-value="0" style:font-size-asian="14pt" style:font-style-asian="normal" style:font-weight-asian="normal" style:font-size-complex="14pt" style:font-style-complex="normal" style:font-weight-complex="normal" loext:padding="0cm" loext:border="none"/>
    </style:style>
    <style:style style:name="T26" style:family="text">
      <style:text-properties fo:font-variant="normal" fo:text-transform="none" fo:color="#000000" loext:opacity="100%" style:text-line-through-style="none" style:text-line-through-type="none" style:font-name="Times New Roman" fo:letter-spacing="normal" fo:font-style="normal" style:text-underline-style="none" fo:font-weight="normal" style:text-blinking="false" fo:background-color="#ffffff" loext:char-shading-value="0" style:font-style-asian="normal" style:font-style-complex="normal"/>
    </style:style>
    <style:style style:name="T27" style:family="text">
      <style:text-properties fo:font-variant="normal" fo:text-transform="none" fo:color="#000000" loext:opacity="100%" style:font-name="Times New Roman" fo:letter-spacing="normal" fo:font-style="normal" fo:font-weight="normal" fo:background-color="#ffffff" loext:char-shading-value="0" style:font-style-asian="normal" style:font-style-complex="normal"/>
    </style:style>
    <style:style style:name="T28" style:family="text">
      <style:text-properties fo:font-variant="normal" fo:text-transform="none" fo:color="#000000" loext:opacity="100%" style:font-name="Times New Roman" fo:font-size="14pt" fo:font-style="normal" style:text-underline-style="none" fo:font-weight="normal" officeooo:rsid="000b8d53" fo:background-color="#ffffff" loext:char-shading-value="0" style:font-size-asian="14pt" style:font-style-asian="normal" style:font-weight-asian="normal" style:font-size-complex="14pt" style:font-style-complex="normal" style:font-weight-complex="normal" loext:padding="0cm" loext:border="none"/>
    </style:style>
    <style:style style:name="T29" style:family="text">
      <style:text-properties fo:font-variant="normal" fo:text-transform="none" fo:color="#000000" loext:opacity="100%" style:font-name="Times New Roman" fo:font-size="14pt" fo:font-style="normal" style:text-underline-style="none" fo:font-weight="normal" officeooo:rsid="000ef5b4" fo:background-color="#ffffff" loext:char-shading-value="0" style:font-size-asian="14pt" style:font-style-asian="normal" style:font-weight-asian="normal" style:font-size-complex="14pt" style:font-style-complex="normal" style:font-weight-complex="normal" loext:padding="0cm" loext:border="none"/>
    </style:style>
    <style:style style:name="T30" style:family="text">
      <style:text-properties fo:font-variant="normal" fo:text-transform="none" fo:color="#000000" loext:opacity="100%" style:font-name="Times New Roman" fo:font-size="14pt" fo:letter-spacing="normal" fo:font-style="normal" style:text-underline-style="none" fo:font-weight="normal" officeooo:rsid="000ef5b4" fo:background-color="#ffffff" loext:char-shading-value="0" style:font-size-asian="14pt" style:font-style-asian="normal" style:font-weight-asian="normal" style:font-size-complex="14pt" style:font-style-complex="normal" style:font-weight-complex="normal" loext:padding="0cm" loext:border="none"/>
    </style:style>
    <style:style style:name="T31" style:family="text">
      <style:text-properties fo:font-variant="normal" fo:text-transform="none" fo:color="#000000" loext:opacity="100%" style:font-name="Times New Roman" fo:font-size="14pt" fo:letter-spacing="normal" fo:font-style="normal" style:text-underline-style="none" fo:font-weight="normal" officeooo:rsid="0010c743" fo:background-color="#ffffff" loext:char-shading-value="0" style:font-size-asian="14pt" style:font-style-asian="normal" style:font-weight-asian="normal" style:font-size-complex="14pt" style:font-style-complex="normal" style:font-weight-complex="normal" loext:padding="0cm" loext:border="none"/>
    </style:style>
    <style:style style:name="T32" style:family="text">
      <style:text-properties fo:font-variant="normal" fo:text-transform="none" fo:color="#000000" loext:opacity="100%" style:font-name="Times New Roman" fo:font-size="14pt" fo:font-style="normal" style:text-underline-style="none" fo:font-weight="normal" officeooo:rsid="0010c743" fo:background-color="#ffffff" loext:char-shading-value="0" style:font-size-asian="14pt" style:font-style-asian="normal" style:font-weight-asian="normal" style:font-size-complex="14pt" style:font-style-complex="normal" style:font-weight-complex="normal" loext:padding="0cm" loext:border="none"/>
    </style:style>
    <style:style style:name="T33" style:family="text">
      <style:text-properties fo:font-variant="normal" fo:text-transform="none" fo:color="#000000" loext:opacity="100%" style:font-name="Times New Roman" fo:font-size="14pt" fo:font-style="normal" style:text-underline-style="none" fo:font-weight="normal" officeooo:rsid="0010d872" fo:background-color="#ffffff" loext:char-shading-value="0" style:font-size-asian="14pt" style:font-style-asian="normal" style:font-weight-asian="normal" style:font-size-complex="14pt" style:font-style-complex="normal" style:font-weight-complex="normal" loext:padding="0cm" loext:border="none"/>
    </style:style>
    <style:style style:name="T34" style:family="text">
      <style:text-properties fo:font-variant="normal" fo:text-transform="none" fo:color="#000000" loext:opacity="100%" style:font-name="Times New Roman" fo:font-size="14pt" fo:letter-spacing="normal" fo:font-style="normal" style:text-underline-style="none" fo:font-weight="bold" officeooo:rsid="0010d872" fo:background-color="#ffffff" loext:char-shading-value="0" style:font-size-asian="14pt" style:font-style-asian="normal" style:font-size-complex="14pt" style:font-style-complex="normal" loext:padding="0cm" loext:border="none"/>
    </style:style>
    <style:style style:name="T35" style:family="text">
      <style:text-properties fo:font-variant="normal" fo:text-transform="none" fo:color="#000000" loext:opacity="100%" style:font-name="Times New Roman" fo:font-size="14pt" fo:letter-spacing="normal" fo:font-style="normal" style:text-underline-style="none" fo:font-weight="normal" officeooo:rsid="0010d872" fo:background-color="#ffffff" loext:char-shading-value="0" style:font-size-asian="14pt" style:font-style-asian="normal" style:font-weight-asian="normal" style:font-size-complex="14pt" style:font-style-complex="normal" style:font-weight-complex="normal" loext:padding="0cm" loext:border="none"/>
    </style:style>
    <style:style style:name="T36" style:family="text">
      <style:text-properties fo:font-variant="normal" fo:text-transform="none" fo:color="#000000" loext:opacity="100%" style:font-name="Times New Roman" fo:font-size="14pt" fo:font-style="normal" style:text-underline-style="none" fo:font-weight="normal" officeooo:rsid="0011c16f" fo:background-color="#ffffff" loext:char-shading-value="0" style:font-size-asian="14pt" style:font-style-asian="normal" style:font-weight-asian="normal" style:font-size-complex="14pt" style:font-style-complex="normal" style:font-weight-complex="normal" loext:padding="0cm" loext:border="none"/>
    </style:style>
    <style:style style:name="T37" style:family="text">
      <style:text-properties fo:font-variant="normal" fo:text-transform="none" fo:color="#000000" loext:opacity="100%" style:font-name="Times New Roman" fo:font-size="14pt" fo:letter-spacing="normal" fo:font-style="normal" style:text-underline-style="none" fo:font-weight="normal" officeooo:rsid="0011c16f" fo:background-color="#ffffff" loext:char-shading-value="0" style:font-size-asian="14pt" style:font-style-asian="normal" style:font-weight-asian="normal" style:font-size-complex="14pt" style:font-style-complex="normal" style:font-weight-complex="normal" loext:padding="0cm" loext:border="none"/>
    </style:style>
    <style:style style:name="T38" style:family="text">
      <style:text-properties fo:color="#000000" loext:opacity="100%" style:font-name="Times New Roman" fo:font-size="14pt" fo:font-weight="bold" fo:background-color="#ffffff" loext:char-shading-value="0" style:font-style-asian="normal" style:font-style-complex="normal" loext:padding="0cm" loext:border="none"/>
    </style:style>
    <style:style style:name="T39" style:family="text">
      <style:text-properties fo:color="#000000" loext:opacity="100%" style:font-name="Times New Roman" fo:font-size="14pt" fo:background-color="#ffffff" loext:char-shading-value="0" style:font-style-asian="normal" style:font-style-complex="normal"/>
    </style:style>
    <style:style style:name="T40" style:family="text">
      <style:text-properties fo:font-variant="normal" fo:text-transform="none" fo:color="#000000" loext:opacity="100%" style:font-name="Times New Roman" fo:font-size="14pt" fo:letter-spacing="normal" fo:font-style="normal" fo:font-weight="bold" fo:background-color="#ffffff" loext:char-shading-value="0" style:font-size-asian="14pt" style:font-style-asian="normal" style:font-size-complex="14pt" style:font-style-complex="normal" loext:padding="0cm" loext:border="none"/>
    </style:style>
    <style:style style:name="T41" style:family="text">
      <style:text-properties fo:font-variant="normal" fo:text-transform="none" fo:color="#000000" loext:opacity="100%" style:font-name="Times New Roman" fo:font-size="14pt" fo:letter-spacing="normal" fo:font-style="normal" fo:font-weight="bold" fo:background-color="#ffffff" loext:char-shading-value="0" style:font-style-asian="normal" style:font-style-complex="normal" loext:padding="0cm" loext:border="none"/>
    </style:style>
    <style:style style:name="T42" style:family="text">
      <style:text-properties fo:font-variant="normal" fo:text-transform="none" fo:color="#000000" loext:opacity="100%" style:font-name="Times New Roman" fo:font-size="14pt" fo:letter-spacing="normal" fo:font-style="normal" fo:font-weight="normal" fo:background-color="#ffffff" loext:char-shading-value="0" style:font-style-asian="normal" style:font-style-complex="normal"/>
    </style:style>
    <style:style style:name="T43" style:family="text">
      <style:text-properties fo:color="#000000" loext:opacity="100%" style:font-name="Times New Roman" fo:font-size="14pt" fo:font-style="normal" fo:font-weight="bold" fo:background-color="#ffffff" loext:char-shading-value="0" style:font-size-asian="14pt" style:font-style-asian="normal" style:font-size-complex="14pt" style:font-style-complex="normal" loext:padding="0cm" loext:border="none"/>
    </style:style>
    <style:style style:name="T44" style:family="text">
      <style:text-properties fo:font-variant="normal" fo:text-transform="none" fo:color="#000000" loext:opacity="100%" style:font-name="Times New Roman" fo:font-size="14pt" fo:font-style="normal" style:text-underline-style="none" fo:font-weight="normal" officeooo:rsid="0013d8b4" fo:background-color="#ffffff" loext:char-shading-value="0" style:font-size-asian="14pt" style:font-style-asian="normal" style:font-weight-asian="normal" style:font-size-complex="14pt" style:font-style-complex="normal" style:font-weight-complex="normal" loext:padding="0cm" loext:border="none"/>
    </style:style>
    <style:style style:name="T45" style:family="text">
      <style:text-properties fo:font-variant="normal" fo:text-transform="none" fo:color="#000000" loext:opacity="100%" style:font-name="Times New Roman" fo:font-size="14pt" fo:letter-spacing="normal" fo:font-style="normal" style:text-underline-style="none" fo:font-weight="normal" officeooo:rsid="0013d8b4" fo:background-color="#ffffff" loext:char-shading-value="0" style:font-size-asian="14pt" style:font-style-asian="normal" style:font-weight-asian="normal" style:font-size-complex="14pt" style:font-style-complex="normal" style:font-weight-complex="normal" loext:padding="0cm" loext:border="none"/>
    </style:style>
    <style:style style:name="T46" style:family="text">
      <style:text-properties fo:font-variant="normal" fo:text-transform="none" fo:color="#000000" loext:opacity="100%" style:font-name="Times New Roman" fo:font-size="14pt" fo:font-style="normal" style:text-underline-style="none" fo:font-weight="normal" officeooo:rsid="0015bd28" fo:background-color="#ffffff" loext:char-shading-value="0" style:font-size-asian="14pt" style:font-style-asian="normal" style:font-weight-asian="normal" style:font-size-complex="14pt" style:font-style-complex="normal" style:font-weight-complex="normal" loext:padding="0cm" loext:border="none"/>
    </style:style>
    <style:style style:name="T47" style:family="text">
      <style:text-properties fo:font-variant="normal" fo:text-transform="none" fo:color="#000000" loext:opacity="100%" style:font-name="Times New Roman" fo:font-size="14pt" fo:letter-spacing="normal" fo:font-style="normal" style:text-underline-style="none" fo:font-weight="normal" officeooo:rsid="0015bd28" fo:background-color="#ffffff" loext:char-shading-value="0" style:font-size-asian="14pt" style:font-style-asian="normal" style:font-weight-asian="normal" style:font-size-complex="14pt" style:font-style-complex="normal" style:font-weight-complex="normal" loext:padding="0cm" loext:border="none"/>
    </style:style>
    <style:style style:name="T48" style:family="text">
      <style:text-properties fo:font-variant="normal" fo:text-transform="none" fo:color="#000000" loext:opacity="100%" style:text-line-through-style="none" style:text-line-through-type="none" style:font-name="Times New Roman" fo:font-size="14pt" fo:letter-spacing="normal" fo:font-style="normal" style:text-underline-style="none" fo:font-weight="normal" officeooo:rsid="0015bd28" style:text-blinking="false" fo:background-color="#ffffff" loext:char-shading-value="0" style:font-size-asian="14pt" style:font-style-asian="normal" style:font-weight-asian="normal" style:font-size-complex="14pt" style:font-style-complex="normal" style:font-weight-complex="normal" loext:padding="0cm" loext:border="none"/>
    </style:style>
    <style:style style:name="T49" style:family="text">
      <style:text-properties fo:font-variant="normal" fo:text-transform="none" fo:color="#000080" loext:opacity="100%" style:text-line-through-style="none" style:text-line-through-type="none" style:font-name="Times New Roman" fo:font-size="14pt" fo:letter-spacing="normal" fo:font-style="normal" style:text-underline-style="solid" style:text-underline-width="auto" style:text-underline-color="font-color" fo:font-weight="normal" officeooo:rsid="0015bd28" style:text-blinking="false" fo:background-color="#ffffff" loext:char-shading-value="0" style:font-size-asian="14pt" style:font-style-asian="normal" style:font-weight-asian="normal" style:font-size-complex="14pt" style:font-style-complex="normal" style:font-weight-complex="normal" loext:padding="0cm" loext:border="none"/>
    </style:style>
    <style:style style:name="T50" style:family="text">
      <style:text-properties fo:font-variant="normal" fo:text-transform="none" fo:color="#000000" loext:opacity="100%" style:font-name="Times New Roman" fo:font-size="14pt" fo:font-style="normal" style:text-underline-style="solid" style:text-underline-width="auto" style:text-underline-color="font-color" fo:font-weight="normal" officeooo:rsid="0015bd28" fo:background-color="#ffffff" loext:char-shading-value="0" style:font-size-asian="14pt" style:font-style-asian="normal" style:font-weight-asian="normal" style:font-size-complex="14pt" style:font-style-complex="normal" style:font-weight-complex="normal" loext:padding="0cm" loext:border="none"/>
    </style:style>
    <style:style style:name="T51" style:family="text">
      <style:text-properties fo:font-variant="normal" fo:text-transform="none" fo:color="#000000" loext:opacity="100%" style:font-name="Times New Roman" fo:font-size="14pt" fo:font-style="normal" style:text-underline-style="none" fo:font-weight="bold" officeooo:rsid="0015bd28" fo:background-color="#ffffff" loext:char-shading-value="0" style:font-size-asian="14pt" style:font-style-asian="normal" style:font-weight-asian="normal" style:font-size-complex="14pt" style:font-style-complex="normal" style:font-weight-complex="normal" loext:padding="0cm" loext:border="none"/>
    </style:style>
    <style:style style:name="T52" style:family="text">
      <style:text-properties fo:font-variant="normal" fo:text-transform="none" fo:color="#000000" loext:opacity="100%" style:font-name="Times New Roman" fo:font-size="14pt" fo:font-style="normal" style:text-underline-style="none" officeooo:rsid="0015bd28" fo:background-color="#ffffff" loext:char-shading-value="0" style:font-size-asian="14pt" style:font-style-asian="normal" style:font-size-complex="14pt" style:font-style-complex="normal" loext:padding="0cm" loext:border="none"/>
    </style:style>
    <style:style style:name="T53" style:family="text">
      <style:text-properties fo:color="#000000" loext:opacity="100%" style:font-name="Times New Roman" fo:font-style="normal" fo:background-color="#ffffff" loext:char-shading-value="0" style:font-style-asian="normal" style:font-style-complex="normal"/>
    </style:style>
    <style:style style:name="T54" style:family="text">
      <style:text-properties fo:font-variant="normal" fo:text-transform="none" fo:color="#000000" loext:opacity="100%" style:font-name="Times New Roman" fo:font-size="14pt" fo:font-style="normal" style:text-underline-style="none" fo:font-weight="normal" officeooo:rsid="00176b30" fo:background-color="#ffffff" loext:char-shading-value="0" style:font-size-asian="14pt" style:font-style-asian="normal" style:font-weight-asian="normal" style:font-size-complex="14pt" style:font-style-complex="normal" style:font-weight-complex="normal" loext:padding="0cm" loext:border="none"/>
    </style:style>
    <style:style style:name="T55" style:family="text">
      <style:text-properties fo:font-variant="normal" fo:text-transform="none" fo:color="#000000" loext:opacity="100%" style:font-name="Times New Roman" fo:font-size="14pt" fo:letter-spacing="normal" fo:font-style="normal" style:text-underline-style="none" fo:font-weight="normal" officeooo:rsid="00176b30" fo:background-color="#ffffff" loext:char-shading-value="0" style:font-size-asian="14pt" style:font-style-asian="normal" style:font-weight-asian="normal" style:font-size-complex="14pt" style:font-style-complex="normal" style:font-weight-complex="normal" loext:padding="0cm" loext:border="none"/>
    </style:style>
    <style:style style:name="T56" style:family="text">
      <style:text-properties fo:font-variant="normal" fo:text-transform="none" fo:color="#000080" loext:opacity="100%" style:font-name="Times New Roman" fo:font-size="14pt" fo:letter-spacing="normal" fo:font-style="normal" style:text-underline-style="solid" style:text-underline-width="auto" style:text-underline-color="font-color" fo:font-weight="normal" officeooo:rsid="00176b30" fo:background-color="#ffffff" loext:char-shading-value="0" style:font-size-asian="14pt" style:font-style-asian="normal" style:font-weight-asian="normal" style:font-size-complex="14pt" style:font-style-complex="normal" style:font-weight-complex="normal" loext:padding="0cm" loext:border="none"/>
    </style:style>
    <style:style style:name="T57" style:family="text">
      <style:text-properties fo:font-variant="normal" fo:text-transform="none" fo:color="#000000" loext:opacity="100%" style:font-name="Times New Roman" fo:font-size="14pt" fo:font-style="normal" style:text-underline-style="none" fo:font-weight="normal" officeooo:rsid="001a178e" fo:background-color="#ffffff" loext:char-shading-value="0" style:font-size-asian="14pt" style:font-style-asian="normal" style:font-weight-asian="normal" style:font-size-complex="14pt" style:font-style-complex="normal" style:font-weight-complex="normal" loext:padding="0cm" loext:border="none"/>
    </style:style>
    <style:style style:name="T58" style:family="text">
      <style:text-properties officeooo:rsid="001a178e"/>
    </style:style>
    <style:style style:name="T59" style:family="text">
      <style:text-properties fo:font-variant="normal" fo:text-transform="none" fo:color="#000000" loext:opacity="100%" style:font-name="Times New Roman" fo:font-size="14pt" fo:letter-spacing="normal" fo:font-style="normal" style:text-underline-style="none" fo:font-weight="normal" officeooo:rsid="001a178e" fo:background-color="#ffffff" loext:char-shading-value="0" style:font-size-asian="14pt" style:font-style-asian="normal" style:font-weight-asian="normal" style:font-size-complex="14pt" style:font-style-complex="normal" style:font-weight-complex="normal" loext:padding="0cm" loext:border="none"/>
    </style:style>
    <style:style style:name="T60" style:family="text">
      <style:text-properties fo:font-variant="normal" fo:text-transform="none" fo:color="#000000" loext:opacity="100%" style:font-name="Times New Roman" fo:font-size="14pt" fo:font-style="normal" style:text-underline-style="none" officeooo:rsid="001a178e" fo:background-color="#ffffff" loext:char-shading-value="0" style:font-size-asian="14pt" style:font-style-asian="normal" style:font-size-complex="14pt" style:font-style-complex="normal" loext:padding="0cm" loext:border="none"/>
    </style:style>
    <style:style style:name="T61" style:family="text">
      <style:text-properties fo:font-variant="normal" fo:text-transform="none" fo:color="#000000" loext:opacity="100%" style:font-name="Times New Roman" fo:font-size="14pt" fo:font-style="normal" style:text-underline-style="none" fo:font-weight="normal" officeooo:rsid="001a55e3" fo:background-color="#ffffff" loext:char-shading-value="0" style:font-size-asian="14pt" style:font-style-asian="normal" style:font-weight-asian="normal" style:font-size-complex="14pt" style:font-style-complex="normal" style:font-weight-complex="normal" loext:padding="0cm" loext:border="none"/>
    </style:style>
    <style:style style:name="T62" style:family="text">
      <style:text-properties fo:color="#000000" loext:opacity="100%" style:font-name="Times New Roman" fo:font-size="14pt" fo:font-style="normal" officeooo:rsid="001a55e3" fo:background-color="#ffffff" loext:char-shading-value="0" style:font-size-asian="14pt" style:font-style-asian="normal" style:font-size-complex="14pt" style:font-style-complex="normal"/>
    </style:style>
    <style:style style:name="T63" style:family="text">
      <style:text-properties fo:font-variant="normal" fo:text-transform="none" fo:color="#000000" loext:opacity="100%" style:font-name="Times New Roman" fo:font-size="14pt" fo:font-style="normal" style:text-underline-style="none" fo:font-weight="bold" officeooo:rsid="001a55e3" fo:background-color="#ffffff" loext:char-shading-value="0" style:font-size-asian="14pt" style:font-style-asian="normal" style:font-weight-asian="bold" style:font-size-complex="14pt" style:font-style-complex="normal" style:font-weight-complex="bold" loext:padding="0cm" loext:border="none"/>
    </style:style>
    <style:style style:name="T64" style:family="text">
      <style:text-properties fo:color="#000000" loext:opacity="100%" style:font-name="Times New Roman" fo:font-style="normal" fo:background-color="#ffffff" loext:char-shading-value="0" style:font-style-asian="normal" style:font-style-complex="normal" loext:padding="0cm" loext:border="none"/>
    </style:style>
    <style:style style:name="T65" style:family="text">
      <style:text-properties fo:font-variant="normal" fo:text-transform="none" fo:color="#000000" loext:opacity="100%" style:font-name="Times New Roman" fo:font-size="14pt" fo:font-style="normal" style:text-underline-style="none" fo:font-weight="bold" officeooo:rsid="001c2ce5" fo:background-color="#ffffff" loext:char-shading-value="0" style:font-size-asian="14pt" style:font-style-asian="normal" style:font-weight-asian="bold" style:font-size-complex="14pt" style:font-style-complex="normal" style:font-weight-complex="bold" loext:padding="0cm" loext:border="none"/>
    </style:style>
    <style:style style:name="T66" style:family="text">
      <style:text-properties fo:font-variant="normal" fo:text-transform="none" fo:color="#000000" loext:opacity="100%" style:font-name="Times New Roman" fo:font-size="14pt" fo:letter-spacing="normal" fo:font-style="normal" style:text-underline-style="none" fo:font-weight="bold" officeooo:rsid="001c2ce5" fo:background-color="#ffffff" loext:char-shading-value="0" style:font-size-asian="14pt" style:font-style-asian="normal" style:font-weight-asian="bold" style:font-size-complex="14pt" style:font-style-complex="normal" style:font-weight-complex="bold" loext:padding="0cm" loext:border="none"/>
    </style:style>
    <style:style style:name="T67" style:family="text">
      <style:text-properties fo:font-variant="normal" fo:text-transform="none" fo:color="#000000" loext:opacity="100%" style:font-name="Times New Roman" fo:font-size="14pt" fo:letter-spacing="normal" fo:font-style="normal" style:text-underline-style="none" fo:font-weight="normal" officeooo:rsid="001c2ce5" fo:background-color="#ffffff" loext:char-shading-value="0" style:font-size-asian="14pt" style:font-style-asian="normal" style:font-weight-asian="bold" style:font-size-complex="14pt" style:font-style-complex="normal" style:font-weight-complex="bold" loext:padding="0cm" loext:border="none"/>
    </style:style>
    <style:style style:name="T68" style:family="text">
      <style:text-properties fo:font-variant="normal" fo:text-transform="none" fo:color="#000000" loext:opacity="100%" style:font-name="Times New Roman" fo:font-size="14pt" fo:letter-spacing="normal" fo:font-style="normal" style:text-underline-style="none" fo:font-weight="normal" officeooo:rsid="001c2ce5" fo:background-color="#ffffff" loext:char-shading-value="0" style:font-size-asian="14pt" style:font-style-asian="normal" style:font-size-complex="14pt" style:font-style-complex="normal" loext:padding="0cm" loext:border="none"/>
    </style:style>
    <style:style style:name="T69" style:family="text">
      <style:text-properties fo:font-variant="normal" fo:text-transform="none" fo:color="#000000" loext:opacity="100%" style:font-name="Times New Roman" fo:font-size="14pt" fo:letter-spacing="normal" fo:font-style="normal" style:text-underline-style="none" fo:font-weight="bold" officeooo:rsid="001c2ce5" fo:background-color="#ffffff" loext:char-shading-value="0" style:font-size-asian="14pt" style:font-style-asian="normal" style:font-size-complex="14pt" style:font-style-complex="normal" loext:padding="0cm" loext:border="none"/>
    </style:style>
    <style:style style:name="T70" style:family="text">
      <style:text-properties fo:font-variant="normal" fo:text-transform="none" fo:color="#000000" loext:opacity="100%" style:font-name="Times New Roman" fo:font-size="14pt" fo:font-style="normal" style:text-underline-style="none" fo:font-weight="bold" officeooo:rsid="001f5b4f" fo:background-color="#ffffff" loext:char-shading-value="0" style:font-size-asian="14pt" style:font-style-asian="normal" style:font-weight-asian="bold" style:font-size-complex="14pt" style:font-style-complex="normal" style:font-weight-complex="bold" loext:padding="0cm" loext:border="none"/>
    </style:style>
    <style:style style:name="T71" style:family="text">
      <style:text-properties fo:font-variant="normal" fo:text-transform="none" fo:color="#000000" loext:opacity="100%" style:font-name="Times New Roman" fo:font-size="14pt" fo:letter-spacing="normal" fo:font-style="normal" style:text-underline-style="none" fo:font-weight="normal" officeooo:rsid="001f5b4f" fo:background-color="#ffffff" loext:char-shading-value="0" style:font-size-asian="14pt" style:font-style-asian="normal" style:font-weight-asian="bold" style:font-size-complex="14pt" style:font-style-complex="normal" style:font-weight-complex="bold" loext:padding="0cm" loext:border="none"/>
    </style:style>
    <style:style style:name="T72" style:family="text">
      <style:text-properties fo:font-variant="normal" fo:text-transform="none" fo:color="#000000" loext:opacity="100%" style:font-name="Times New Roman" fo:font-size="14pt" fo:letter-spacing="normal" fo:font-style="normal" style:text-underline-style="none" fo:font-weight="bold" officeooo:rsid="001f5b4f" fo:background-color="#ffffff" loext:char-shading-value="0" style:font-size-asian="14pt" style:font-style-asian="normal" style:font-weight-asian="bold" style:font-size-complex="14pt" style:font-style-complex="normal" style:font-weight-complex="bold" loext:padding="0cm" loext:border="none"/>
    </style:style>
    <style:style style:name="T73" style:family="text">
      <style:text-properties fo:font-variant="normal" fo:text-transform="none" fo:color="#000000" loext:opacity="100%" style:font-name="Times New Roman" fo:font-size="14pt" fo:letter-spacing="normal" fo:font-style="normal" style:text-underline-style="none" fo:font-weight="normal" officeooo:rsid="001a178e" fo:background-color="#ffffff" loext:char-shading-value="0" style:font-size-asian="14pt" style:font-style-asian="normal" style:font-weight-asian="bold" style:font-size-complex="14pt" style:font-style-complex="normal" style:font-weight-complex="bold" loext:padding="0cm" loext:border="none"/>
    </style:style>
    <style:style style:name="T74" style:family="text">
      <style:text-properties fo:font-variant="normal" fo:text-transform="none" fo:color="#000000" loext:opacity="100%" style:font-name="Times New Roman" fo:font-size="14pt" fo:letter-spacing="normal" fo:font-style="normal" style:text-underline-style="none" fo:font-weight="bold" officeooo:rsid="001a178e" fo:background-color="#ffffff" loext:char-shading-value="0" style:font-size-asian="14pt" style:font-style-asian="normal" style:font-weight-asian="bold" style:font-size-complex="14pt" style:font-style-complex="normal" style:font-weight-complex="bold" loext:padding="0cm" loext:border="none"/>
    </style:style>
    <style:style style:name="T75" style:family="text">
      <style:text-properties fo:font-variant="normal" fo:text-transform="none" fo:color="#000000" loext:opacity="100%" style:font-name="Times New Roman" fo:font-size="14pt" fo:font-style="normal" style:text-underline-style="none" fo:font-weight="bold" officeooo:rsid="001a178e" fo:background-color="#ffffff" loext:char-shading-value="0" style:font-size-asian="14pt" style:font-style-asian="normal" style:font-weight-asian="bold" style:font-size-complex="14pt" style:font-style-complex="normal" style:font-weight-complex="bold" loext:padding="0cm" loext:border="none"/>
    </style:style>
    <style:style style:name="T76" style:family="text">
      <style:text-properties fo:font-weight="bold"/>
    </style:style>
    <style:style style:name="T77" style:family="text">
      <style:text-properties fo:color="#000000" loext:opacity="100%" style:font-name="Times New Roman" fo:font-size="14pt" fo:font-style="normal" fo:background-color="#ffffff" loext:char-shading-value="0" style:font-size-asian="14pt" style:font-style-asian="normal" style:font-size-complex="14pt" style:font-style-complex="normal"/>
    </style:style>
    <style:style style:name="T78" style:family="text">
      <style:text-properties fo:font-variant="normal" fo:text-transform="none" fo:color="#000000" loext:opacity="100%" style:font-name="Times New Roman" fo:font-size="14pt" fo:letter-spacing="normal" fo:font-style="normal" fo:background-color="#ffffff" loext:char-shading-value="0" style:font-size-asian="14pt" style:font-style-asian="normal" style:font-size-complex="14pt" style:font-style-complex="normal"/>
    </style:style>
    <style:style style:name="T79" style:family="text">
      <style:text-properties fo:color="#000000" loext:opacity="100%" style:font-name="Times New Roman" fo:font-size="14pt" fo:font-style="normal" style:text-underline-style="solid" style:text-underline-width="auto" style:text-underline-color="font-color" fo:background-color="#ffffff" loext:char-shading-value="0" style:font-size-asian="14pt" style:font-style-asian="normal" style:font-size-complex="14pt" style:font-style-complex="normal"/>
    </style:style>
    <style:style style:name="T80" style:family="text">
      <style:text-properties fo:font-variant="normal" fo:text-transform="none" fo:letter-spacing="normal" fo:font-weight="normal"/>
    </style:style>
    <style:style style:name="T81" style:family="text">
      <style:text-properties fo:color="#000000" loext:opacity="100%" style:font-name="Times New Roman" fo:font-size="14pt" fo:font-style="normal" fo:background-color="#ffffff" loext:char-shading-value="0" style:font-size-asian="14pt" style:font-style-asian="normal" style:font-size-complex="14pt" style:font-style-complex="normal" loext:padding="0cm" loext:border="none"/>
    </style:style>
    <style:style style:name="T82" style:family="text">
      <style:text-properties fo:font-variant="normal" fo:text-transform="none" fo:color="#000000" loext:opacity="100%" style:font-name="Times New Roman" fo:font-size="14pt" fo:font-style="normal" fo:font-weight="normal" fo:background-color="#ffffff" loext:char-shading-value="0" style:font-size-asian="14pt" style:font-style-asian="normal" style:font-size-complex="14pt" style:font-style-complex="normal"/>
    </style:style>
    <style:style style:name="T83" style:family="text">
      <style:text-properties fo:font-variant="normal" fo:text-transform="none" fo:color="#000000" loext:opacity="100%" style:font-name="Times New Roman" fo:font-size="14pt" fo:letter-spacing="normal" fo:font-style="normal" fo:font-weight="normal" fo:background-color="#ffffff" loext:char-shading-value="0" style:font-size-asian="14pt" style:font-style-asian="normal" style:font-size-complex="14pt" style:font-style-complex="normal"/>
    </style:style>
    <style:style style:name="T84" style:family="text">
      <style:text-properties fo:font-variant="normal" fo:text-transform="none" fo:color="#000000" loext:opacity="100%" style:text-line-through-style="none" style:text-line-through-type="none" style:font-name="Times New Roman" fo:font-size="14pt" fo:letter-spacing="normal" fo:font-style="normal" style:text-underline-style="none" fo:font-weight="normal" style:text-blinking="false" fo:background-color="#ffffff" loext:char-shading-value="0" style:font-size-asian="14pt" style:font-style-asian="normal" style:font-size-complex="14pt" style:font-style-complex="normal" loext:padding-left="0cm" loext:padding-right="0cm" loext:padding-top="0cm" loext:padding-bottom="0.079cm" loext:border-left="none" loext:border-right="none" loext:border-top="none" loext:border-bottom="0.06pt solid #3a42e5"/>
    </style:style>
    <style:style style:name="T85" style:family="text">
      <style:text-properties fo:font-variant="normal" fo:text-transform="none" fo:color="#000000" loext:opacity="100%" style:font-name="Times New Roman" fo:font-size="14pt" fo:letter-spacing="normal" fo:font-style="normal" fo:font-weight="bold" fo:background-color="#ffffff" loext:char-shading-value="0" style:font-size-asian="14pt" style:font-style-asian="normal" style:font-size-complex="14pt" style:font-style-complex="normal"/>
    </style:style>
    <style:style style:name="T86" style:family="text">
      <style:text-properties fo:color="#000000" loext:opacity="100%" style:font-name="Times New Roman" fo:font-size="14pt" fo:font-style="normal" fo:font-weight="bold" fo:background-color="#ffffff" loext:char-shading-value="0" style:font-size-asian="14pt" style:font-style-asian="normal" style:font-size-complex="14pt" style:font-style-complex="normal"/>
    </style:style>
    <style:style style:name="T87" style:family="text">
      <style:text-properties fo:color="#000000" loext:opacity="100%" style:font-name="Times New Roman" fo:font-size="14pt" fo:font-weight="bold" fo:background-color="#ffffff" loext:char-shading-value="0" style:font-size-asian="14pt" style:font-style-asian="normal" style:font-size-complex="14pt" style:font-style-complex="normal"/>
    </style:style>
    <style:style style:name="T88" style:family="text">
      <style:text-properties fo:color="#000000" loext:opacity="100%" style:font-name="Times New Roman" fo:font-size="14pt" fo:background-color="#ffffff" loext:char-shading-value="0" style:font-size-asian="14pt" style:font-style-asian="normal" style:font-size-complex="14pt" style:font-style-complex="normal"/>
    </style:style>
    <style:style style:name="T89" style:family="text">
      <style:text-properties fo:color="#000000" loext:opacity="100%" style:text-line-through-style="none" style:text-line-through-type="none" style:font-name="Times New Roman" fo:font-size="14pt" style:text-underline-style="none" style:text-blinking="false" fo:background-color="#ffffff" loext:char-shading-value="0" style:font-size-asian="14pt" style:font-style-asian="normal" style:font-size-complex="14pt" style:font-style-complex="normal" loext:padding="0cm" loext:border="none"/>
    </style:style>
    <style:style style:name="T90" style:family="text">
      <style:text-properties fo:font-variant="normal" fo:text-transform="none" fo:color="#000000" loext:opacity="100%" style:text-line-through-style="none" style:text-line-through-type="none" style:font-name="Times New Roman" fo:font-size="14pt" fo:letter-spacing="normal" fo:font-style="normal" style:text-underline-style="none" fo:font-weight="normal" style:text-blinking="false" fo:background-color="#ffffff" loext:char-shading-value="0" style:font-size-asian="14pt" style:font-style-asian="normal" style:font-size-complex="14pt" style:font-style-complex="normal" loext:padding="0cm" loext:border="none"/>
    </style:style>
    <style:style style:name="T91" style:family="text">
      <style:text-properties fo:font-variant="normal" fo:text-transform="none" fo:color="#000000" loext:opacity="100%" style:font-name="Times New Roman" fo:font-size="14pt" fo:letter-spacing="normal" fo:font-style="normal" style:text-underline-style="solid" style:text-underline-width="auto" style:text-underline-color="font-color" fo:font-weight="normal" fo:background-color="#ffffff" loext:char-shading-value="0" style:font-size-asian="14pt" style:font-style-asian="normal" style:font-size-complex="14pt" style:font-style-complex="normal" loext:padding="0cm" loext:border="none"/>
    </style:style>
    <style:style style:name="T92" style:family="text">
      <style:text-properties fo:font-variant="normal" fo:text-transform="none" fo:color="#000000" loext:opacity="100%" style:font-name="Times New Roman" fo:font-size="14pt" fo:letter-spacing="normal" fo:language="en" fo:country="US" fo:font-style="normal" fo:font-weight="normal" fo:background-color="#ffffff" loext:char-shading-value="0" style:font-size-asian="14pt" style:font-style-asian="normal" style:font-size-complex="14pt" style:font-style-complex="normal"/>
    </style:style>
    <style:style style:name="T93" style:family="text">
      <style:text-properties fo:color="#333333" loext:opacity="100%" fo:font-weight="bold"/>
    </style:style>
    <style:style style:name="T94" style:family="text">
      <style:text-properties fo:font-variant="normal" fo:text-transform="none" fo:color="#333333" loext:opacity="100%" fo:font-size="14pt" fo:letter-spacing="normal" fo:font-style="normal" fo:font-weight="bold" style:font-size-asian="14pt" style:font-size-complex="14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4.207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1.325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RP NEDİR</text:p>
      <text:h text:style-name="P2" text:outline-level="2">Kurumsal kaynak planlamanın (ERP) </text:h>
      <text:p text:style-name="P3"><text:a xlink:type="simple" xlink:href="https://www.oracle.com/tr/erp/" text:style-name="Internet_20_link" text:visited-style-name="Visited_20_Internet_20_Link"><text:span text:style-name="T1">Kurumsal kaynak planlama (ERP)</text:span></text:a><text:span text:style-name="T2">, kurumların </text:span><text:a xlink:type="simple" xlink:href="https://www.oracle.com/tr/erp/financials/" text:style-name="Internet_20_link" text:visited-style-name="Visited_20_Internet_20_Link"><text:span text:style-name="T1">muhasebe</text:span></text:a><text:span text:style-name="T2">, </text:span><text:a xlink:type="simple" xlink:href="https://www.oracle.com/tr/erp/procurement/" text:style-name="Internet_20_link" text:visited-style-name="Visited_20_Internet_20_Link"><text:span text:style-name="T1">satın alma</text:span></text:a><text:span text:style-name="T2">, </text:span><text:a xlink:type="simple" xlink:href="https://www.oracle.com/tr/erp/project-portfolio-management-cloud/" text:style-name="Internet_20_link" text:visited-style-name="Visited_20_Internet_20_Link"><text:span text:style-name="T1">proje yönetimi</text:span></text:a><text:span text:style-name="T2">, </text:span><text:a xlink:type="simple" xlink:href="https://www.oracle.com/tr/erp/risk-management/" text:style-name="Internet_20_link" text:visited-style-name="Visited_20_Internet_20_Link"><text:span text:style-name="T1">risk yönetimi ve mevzuat uyumunun</text:span></text:a><text:span text:style-name="T2"> </text:span><text:span text:style-name="T2">yanı sıra </text:span><text:a xlink:type="simple" xlink:href="https://www.oracle.com/tr/scm/" text:style-name="Internet_20_link" text:visited-style-name="Visited_20_Internet_20_Link"><text:span text:style-name="T1">tedarik zinciri operasyonları</text:span></text:a><text:span text:style-name="T2"> </text:span><text:span text:style-name="T2">gibi günlük iş faaliyetlerini yönetmek için kullandığı bir yazılım türünü ifade eder.</text:span></text:p>
      <text:p text:style-name="P4"/>
      <text:p text:style-name="P5"/>
      <text:p text:style-name="P6">Kurumsal kaynak planlama sistemleri, üretim tabanlı ya da dağıtım işlerinin tüm yönlerini yöneten, şirket içinde veya bulutta çalışan, eksiksiz ve entegre platformlardır.</text:p>
      <text:p text:style-name="P7"/>
      <text:p text:style-name="P7"/>
      <text:p text:style-name="P1"><text:span text:style-name="T3">ERP sistemleri üretim, lojistik ve finansal yönetimin tüm yönlerini izleyerek iş sürecinizin tamamına yönelik şeffaflık da sağlar. Bu entegre sistemler uçtan uca iş akışı ve veri için bir işletmede merkez görevi görür ve çeşitli departmanlara erişim sağlar.</text:span><draw:frame draw:style-name="fr1" draw:name="Görüntü1" text:anchor-type="char" svg:x="2.242cm" svg:y="2.887cm" svg:width="10.964cm" svg:height="6.809cm" draw:z-index="0"><draw:image xlink:href="Pictures/100000000000011D000000B13660D2C5.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ERM VE SAP FARKI NEDİR</text:p>
      <text:p text:style-name="P1">SAP ERP YAZILIMIDIR</text:p>
      <text:p text:style-name="P1"/>
      <text:p text:style-name="P1"/>
      <text:p text:style-name="P1"/>
      <text:p text:style-name="P1"/>
      <text:p text:style-name="P1"/>
      <text:p text:style-name="P1"/>
      <text:p text:style-name="P8">ERP TÜRLERİ</text:p>
      <text:p text:style-name="P9"/>
      <text:p text:style-name="P10"><text:span text:style-name="Strong_20_Emphasis"><text:span text:style-name="T4">Üretim ERP’leri:</text:span></text:span><text:span text:style-name="Strong_20_Emphasis"><text:span text:style-name="T5">Üretim süreçlerini izlemek ve yönetmek için kullanılan yazılımlar. Örneğin: SAP, Oracle, Bilişim, DİA, Canias, Netsis vb.</text:span></text:span><text:span text:style-name="Strong_20_Emphasis"><text:span text:style-name="T6"> </text:span></text:span></text:p>
      <text:p text:style-name="P9"/>
      <text:p text:style-name="P10"><text:soft-page-break/><text:span text:style-name="Strong_20_Emphasis"><text:span text:style-name="T4">Finansal ERP’ler:</text:span></text:span><text:span text:style-name="Strong_20_Emphasis"><text:span text:style-name="T5">Muhasebe, bütçeleme ve finansal raporlama işlemlerine odaklanan ERP’ler. Örnek: Logo, Microsoft Dynamics vb. </text:span></text:span><text:a xlink:type="simple" xlink:href="https://mavvo.com.tr/blog/top-5-muhasebe-yazilimi/" text:style-name="Internet_20_link" text:visited-style-name="Visited_20_Internet_20_Link"><text:span text:style-name="Strong_20_Emphasis"><text:span text:style-name="T7">Türkiye’de en çok kullanılan muhasebe yazılımları</text:span></text:span></text:a><text:span text:style-name="Strong_20_Emphasis"><text:span text:style-name="T5"> hakkında yazdığımız makalemizden faydalanabilirsiniz.</text:span></text:span></text:p>
      <text:p text:style-name="P10"><text:span text:style-name="Strong_20_Emphasis"><text:span text:style-name="T4"/></text:span></text:p>
      <text:p text:style-name="P11"><text:span text:style-name="Strong_20_Emphasis"><text:span text:style-name="T4">İnsan Kaynakları ERP’leri: Personel yönetimi, bordro işlemleri ve performans takibi gibi alanlara daha fazla odaklanan ERP’ler. Örnek: Uyumsoft, Bilişim ERP vb.</text:span></text:span></text:p>
      <text:list text:style-name="L1">
        <text:list-item>
          <text:p text:style-name="P12"><text:span text:style-name="Strong_20_Emphasis"><text:span text:style-name="T8">Ticari, Toptan ve Perakende ERP’leri:</text:span></text:span><text:span text:style-name="T9"> </text:span><text:a xlink:type="simple" xlink:href="https://mavvo.com.tr/blog/tedarik-zinciri-nedir-tedarik-zinciri-yonetiminin-temel-evreleri-ve-faydalari-nelerdir/" text:style-name="Internet_20_link" text:visited-style-name="Visited_20_Internet_20_Link"><text:span text:style-name="T10">Tedarik zinciri</text:span></text:a><text:span text:style-name="T9">, stok yönetimi ve satış süreçlerini optimize eden yazılımlar. Örnek: </text:span><text:a xlink:type="simple" xlink:href="https://mavvo.com.tr/blog/logo-sap-dia/" text:style-name="Internet_20_link" text:visited-style-name="Visited_20_Internet_20_Link"><text:span text:style-name="T10">SAP, Logo, DİA</text:span></text:a><text:span text:style-name="T9">, Nebim vb.</text:span></text:p>
        </text:list-item>
      </text:list>
      <text:p text:style-name="P10"><text:span text:style-name="Strong_20_Emphasis"><text:span text:style-name="T4"/></text:span></text:p>
      <text:p text:style-name="P10"><text:span text:style-name="Strong_20_Emphasis"><text:span text:style-name="T4">ÖRNEKLER</text:span></text:span></text:p>
      <text:p text:style-name="P11"><text:span text:style-name="Strong_20_Emphasis"><text:span text:style-name="T11">SAP:</text:span></text:span><text:span text:style-name="Strong_20_Emphasis"><text:span text:style-name="T4"> Büyük işletmeler ve holdingler tarafından yaygın şekilde kullanılır.</text:span></text:span></text:p>
      <text:list text:style-name="L2">
        <text:list-item>
          <text:p text:style-name="P13"><text:span text:style-name="Strong_20_Emphasis"><text:span text:style-name="T12">Logo:</text:span></text:span><text:span text:style-name="T13"> KOBİ’lere yönelik, kullanım kolaylığı ve yerel destek avantajıyla öne çıkar. </text:span><text:a xlink:type="simple" xlink:href="https://mavvo.com.tr/blog/erp-kullanimi-kolay-mi-logo-dia-micro-sap-canias-ifs/" text:style-name="Internet_20_link" text:visited-style-name="Visited_20_Internet_20_Link"><text:span text:style-name="T14">Logo Erp kullanımı kolay</text:span></text:a><text:span text:style-name="T13"> uygulamalar arasındadır.</text:span></text:p>
        </text:list-item>
        <text:list-item>
          <text:p text:style-name="P13"><text:span text:style-name="Strong_20_Emphasis"><text:span text:style-name="T12">DİA:</text:span></text:span><text:span text:style-name="T13"> Bulut tabanlı ve esnek yapısıyla saha operasyonlarını kolaylaştırır. Kullanımı kolay ve pratik bir erp programıdır.</text:span></text:p>
        </text:list-item>
        <text:list-item>
          <text:p text:style-name="P13"><text:span text:style-name="Strong_20_Emphasis"><text:span text:style-name="T12">IFS ve Canias:</text:span></text:span><text:span text:style-name="T13"> Orta ve büyük ölçekli işletmelerde tercih edilen, kapsamlı çözümler sunan sistemlerdir</text:span></text:p>
        </text:list-item>
      </text:list>
      <text:p text:style-name="P10"><text:span text:style-name="Strong_20_Emphasis"><text:span text:style-name="T4">SAP İ KİMLER KULLANIR</text:span></text:span></text:p>
      <text:p text:style-name="P10"><text:span text:style-name="Strong_20_Emphasis"><text:span text:style-name="T4"/></text:span></text:p>
      <text:p text:style-name="P10"><text:span text:style-name="Strong_20_Emphasis"><text:span text:style-name="T4"/></text:span></text:p>
      <text:p text:style-name="P11"><text:span text:style-name="Strong_20_Emphasis"><text:span text:style-name="T11">Üretim firmaları:</text:span></text:span><text:span text:style-name="Strong_20_Emphasis"><text:span text:style-name="T4"> Hammadde tedariğinden üretime ve dağıtıma kadar tüm süreçleri yönetmek için.</text:span></text:span></text:p>
      <text:list text:style-name="L3">
        <text:list-item>
          <text:p text:style-name="P14"><text:span text:style-name="Strong_20_Emphasis"><text:span text:style-name="T12">Finans kuruluşları:</text:span></text:span><text:span text:style-name="T13"> Muhasebe, bütçeleme ve risk yönetimi süreçlerini optimize etmek için.</text:span></text:p>
        </text:list-item>
        <text:list-item>
          <text:p text:style-name="P14"><text:span text:style-name="Strong_20_Emphasis"><text:span text:style-name="T12">Sağlık sektörü:</text:span></text:span><text:span text:style-name="T13"> Hasta yönetimi, tedarik zinciri ve kaynak yönetimi için.</text:span></text:p>
        </text:list-item>
        <text:list-item>
          <text:p text:style-name="P14"><text:span text:style-name="Strong_20_Emphasis"><text:span text:style-name="T12">Perakende şirketleri:</text:span></text:span><text:span text:style-name="T13"> Stok ve müşteri ilişkileri yönetiminde verimlilik sağlamak için.</text:span></text:p>
        </text:list-item>
      </text:list>
      <text:p text:style-name="P10"><text:span text:style-name="Strong_20_Emphasis"><text:span text:style-name="T4"/></text:span></text:p>
      <text:p text:style-name="P10"><text:span text:style-name="Strong_20_Emphasis"><text:span text:style-name="T4"/></text:span></text:p>
      <text:p text:style-name="P10"><text:span text:style-name="Strong_20_Emphasis"><text:span text:style-name="T4"/></text:span></text:p>
      <text:p text:style-name="P10"><text:span text:style-name="Strong_20_Emphasis"><text:span text:style-name="T4"/></text:span></text:p>
      <text:p text:style-name="P10"><text:span text:style-name="Strong_20_Emphasis"><text:span text:style-name="T4"/></text:span></text:p>
      <text:p text:style-name="P10"><text:span text:style-name="Strong_20_Emphasis"><text:span text:style-name="T4"/></text:span></text:p>
      <text:p text:style-name="P10"><text:span text:style-name="Strong_20_Emphasis"><text:span text:style-name="T4"/></text:span></text:p>
      <text:h text:style-name="P15" text:outline-level="2"><text:span text:style-name="Strong_20_Emphasis"><text:span text:style-name="T15">ERP sistemlerinin temelleri</text:span></text:span></text:h>
      <text:p text:style-name="P16"><text:span text:style-name="T16">ERP sistemleri, işletmelerin çeşitli departmanlardaki operasyonları tümleştirmesine ve kolaylaştırmasına yardımcı olur. Temel olarak ERP, veri ve süreçleri merkezileştirerek daha iyi işbirliği, doğruluk ve karar alma olanağı sağlar. ERP sistemleri şu amaçlarla kullanılır:<text:line-break/></text:span><text:soft-page-break/><text:span text:style-name="T16"><text:line-break/><text:line-break/></text:span><text:span text:style-name="Strong_20_Emphasis"><text:span text:style-name="T17">1. İş birimlerini tümleştirme</text:span></text:span><text:span text:style-name="T16"><text:line-break/>ERP, temel iş süreçlerini tek bir platformda birleştirerek siloları ortadan kaldırır ve iş birimleri arasında sorunsuz bir veri akışı sağlar. ERP sisteminden faydalanabilecek departmanlar şunlardır:</text:span></text:p>
      <text:list text:style-name="L4">
        <text:list-item>
          <text:p text:style-name="P17"><text:span text:style-name="Strong_20_Emphasis"><text:span text:style-name="T17">Finans:</text:span></text:span><text:span text:style-name="T16"> Muhasebe, bütçeleme ve finansal raporlamayı otomatikleştirme.</text:span></text:p>
        </text:list-item>
        <text:list-item>
          <text:p text:style-name="P17"><text:span text:style-name="Strong_20_Emphasis"><text:span text:style-name="T17">Tedarik zinciri:</text:span></text:span><text:span text:style-name="T16"> Envanter, tedarik ve tedarikçi ilişkilerini yönetme.</text:span></text:p>
        </text:list-item>
        <text:list-item>
          <text:p text:style-name="P17"><text:span text:style-name="Strong_20_Emphasis"><text:span text:style-name="T17">Üretim:</text:span></text:span><text:span text:style-name="T16"> Üretim planlama, zamanlama ve kalite kontrolünü denetleme.</text:span></text:p>
        </text:list-item>
        <text:list-item>
          <text:p text:style-name="P17"><text:span text:style-name="Strong_20_Emphasis"><text:span text:style-name="T17">HR:</text:span></text:span><text:span text:style-name="T16"> Bordro, çalışan verileri ve işe alım işlemleri.</text:span></text:p>
        </text:list-item>
      </text:list>
      <text:p text:style-name="P16"><text:span text:style-name="Strong_20_Emphasis"><text:span text:style-name="T17">2. Doğru bilgileri tek bir kaynakta toplama</text:span></text:span><text:span text:style-name="T16"><text:line-break/>ERP, verileri merkezileştirerek tüm departmanların tutarlı ve doğru bilgilere erişmesini sağlar. Bu da hataları azaltır, yinelenen çabaları ortadan kaldırır ve karar alma sürecini daha güvenilir hale getirir.<text:line-break/><text:line-break/></text:span><text:span text:style-name="Strong_20_Emphasis"><text:span text:style-name="T17">3. Görevleri otomatikleştirme ve verimliliği artırma</text:span></text:span><text:span text:style-name="T16"><text:line-break/>ERP sistemleri, faturalama veya sipariş işleme gibi rutin görevleri otomatikleştirerek çalışanların daha yüksek değerli faaliyetlere odaklanmasını sağlar. Otomasyon ayrıca el ile yapılan işler için harcanan zamanı ve kaynakları azaltarak süreç verimliliğini de artırır.<text:line-break/><text:line-break/></text:span><text:span text:style-name="Strong_20_Emphasis"><text:span text:style-name="T17">4. Gerçek zamanlı içgörüler ve raporlama sunma</text:span></text:span><text:span text:style-name="T16"><text:line-break/>ERP ile işletmeler operasyonlar, finansal bilgiler ve performans hakkında gerçek zamanlı içgörüler elde edebilir. Gösterge tabloları ve özelleştirilebilir raporlar, ekiplerin önemli ölçümleri takip etmesine, performansı izlemesine ve veriye dayalı kararları hızla almasına yardımcı olur.<text:line-break/><text:line-break/></text:span><text:span text:style-name="Strong_20_Emphasis"><text:span text:style-name="T17">5. Bulut tabanlı ERP ve yapay zeka özelliklerini benimseme</text:span></text:span><text:span text:style-name="T16"><text:line-break/>Modern ERP çözümleri daha fazla esneklik, ölçeklenebilirlik ve güvenlik için genellikle bulut tabanlıdır. Ayrıca bulut tabanlı ERP sistemleri talep tahmini, tahmine dayalı bakım ve kişiselleştirilmiş müşteri deneyimleri gibi süreçleri iyileştirmek için yapay zekayı kullanır.</text:span></text:p>
      <text:p text:style-name="P10"><text:span text:style-name="Strong_20_Emphasis"><text:span text:style-name="T4"/></text:span></text:p>
      <text:p text:style-name="P10"><text:span text:style-name="Strong_20_Emphasis"><text:span text:style-name="T4"/></text:span></text:p>
      <text:p text:style-name="P10"><text:span text:style-name="Strong_20_Emphasis"><text:span text:style-name="T4"/></text:span></text:p>
      <text:p text:style-name="P10"><text:span text:style-name="Strong_20_Emphasis"><text:span text:style-name="T4"/></text:span></text:p>
      <text:h text:style-name="P18" text:outline-level="3"><text:soft-page-break/><text:span text:style-name="Strong_20_Emphasis"><text:span text:style-name="T18">Borçlar Hesabı (AP):Borçlar hesabı (AP), bir işletmenin genel defterinde yer alan ve işletmenin alacaklılarına veya tedarikçilerine borçlu olduğu parayı temsil eden, şirketin bilançosunda yükümlülük olarak gösterilen bir hesaptır </text:span></text:span></text:h>
      <text:h text:style-name="P18" text:outline-level="3"><text:span text:style-name="Strong_20_Emphasis"><text:span text:style-name="T18">Alacaklar (AR):Alacaklar (AR), bir şirkete veya işletmeye krediyle satın alınan mal ve/veya hizmetler için henüz ödenmemiş olan parayı temsil eder. </text:span></text:span></text:h>
      <text:h text:style-name="P18" text:outline-level="3"><text:span text:style-name="Strong_20_Emphasis"><text:span text:style-name="T18">Gerçek Maliyet:</text:span></text:span><text:span text:style-name="T19">Gerçek maliyet, bir ürün veya varlığı edinmek için ödenen ve/veya harcanan para miktarını ifade eder. Bu aynı zamanda fiili harcama olarak da bilinir ve üretiminde gerekli malzeme ve işçilik için envanter hesaplamalarının yanı sıra bir varlığın teslimatı, kurulumu ve/veya test edilmesiyle ilgili maliyetleri de içerebilir. </text:span></text:h>
      <text:h text:style-name="P18" text:outline-level="3"><text:span text:style-name="Strong_20_Emphasis"><text:span text:style-name="T18">Siparişe Göre Montaj (ATO):</text:span></text:span><text:a xlink:type="simple" xlink:href="https://blog.dys.com/mto-mts-ato/" text:style-name="Internet_20_link" text:visited-style-name="Visited_20_Internet_20_Link"><text:span text:style-name="T20">Siparişe göre montaj (ATO),</text:span></text:a><text:span text:style-name="T19"> bir sipariş oluşturulduktan sonra ürünlerin mevcut stoktaki bileşenlerden ve/veya alt montaj parçalarından monte edildiği bir iş ve üretim stratejisidir. Bu, ürünlerin müşterinin özelliklerine daha iyi uyacak şekilde özelleştirilmesine olanak tanır ve genellikle montaj süresinin önemsiz olduğu, ancak bileşen parçalarının üretimi ve/veya tedarik süresinin önemli olduğu ürünlerde kullanılır.</text:span></text:h>
      <text:h text:style-name="P18" text:outline-level="3"><text:span text:style-name="Strong_20_Emphasis"><text:span text:style-name="T18">Üretimden Stoklamaya (BTS):</text:span></text:span><text:span text:style-name="T19">Stok için üretim (BTS) veya stok için imalat (MTS), ürünlerin gerçek siparişlerden önce üretilip gelecekteki talebi karşılamak üzere stok olarak depolandığı bir iş ve üretim stratejisidir.</text:span></text:h>
      <text:p text:style-name="P10"><text:span text:style-name="Strong_20_Emphasis"><text:span text:style-name="T4"/></text:span></text:p>
      <text:h text:style-name="P18" text:outline-level="3"><text:span text:style-name="Strong_20_Emphasis"><text:span text:style-name="T18">Kapasite Gereksinimleri Planlaması (CRP):</text:span></text:span><text:a xlink:type="simple" xlink:href="https://www.qad.com/blog/2022/03/capacity-requirements-planning-and-its-use-in-manufacturing" text:style-name="Internet_20_link" text:visited-style-name="Visited_20_Internet_20_Link"><text:span text:style-name="T20">Kapasite gereksinim planlaması (CRP)</text:span></text:a><text:span text:style-name="T19"> , mevcut üretim kapasitesine ve üretim hedeflerini karşılayıp karşılayamayacağına dayalı bir planlama tekniğidir. CRP süreci ve/veya yöntemleri, kapasite ihtiyaçlarını tahmin etmek için </text:span><text:a xlink:type="simple" xlink:href="https://www.qad.com/blog/2018/05/joseph-orlicky-hero-materials-requirements-planning" text:style-name="Internet_20_link" text:visited-style-name="Visited_20_Internet_20_Link"><text:span text:style-name="T20">malzeme gereksinim planlamasından (MRP)</text:span></text:a><text:span text:style-name="T19"> planlı sipariş yayınlarını kullanabilir ve bir şirketin planlı üretim programına erişmek için üretimin operasyonel düzeyde bir genel görünümünü sağlar. </text:span></text:h>
      <text:p text:style-name="P10"><text:span text:style-name="Strong_20_Emphasis"><text:span text:style-name="T4"/></text:span></text:p>
      <text:h text:style-name="P18" text:outline-level="3"><text:span text:style-name="Strong_20_Emphasis"><text:span text:style-name="T18">Bulut ERP:</text:span></text:span><text:span text:style-name="T19">Bulut tabanlı ERP, bulutta "hizmet olarak" sunulan kurumsal kaynak planlama ( </text:span><text:a xlink:type="simple" xlink:href="https://www.qad.com/what-is-erp" text:style-name="Internet_20_link" text:visited-style-name="Visited_20_Internet_20_Link"><text:span text:style-name="T21">ERP ) yazılımıdır. </text:span></text:a><text:a xlink:type="simple" xlink:href="https://www.qad.com/cloud-erp" text:style-name="Internet_20_link" text:visited-style-name="Visited_20_Internet_20_Link"><text:span text:style-name="T21">Bulut tabanlı ERP,</text:span></text:a><text:span text:style-name="T19"> internete bağlı herhangi bir cihazdan ve herhangi bir konumdan çözüme erişebilen kullanıcılara ERP sağlamayı basitleştirir. Ayrıca, bulut tabanlı bir ERP müşterisinin ERP için altyapıya yatırım yapma ve bakımını üstlenme ihtiyacını ortadan kaldırır ve yazılım güncellemelerini daha kolay takip etmesini sağlar.</text:span></text:h>
      <text:h text:style-name="P18" text:outline-level="3"><text:span text:style-name="Strong_20_Emphasis"><text:span text:style-name="T18">Üretim için Bulut Tabanlı ERP:</text:span></text:span><text:span text:style-name="T19">Bulut tabanlı bir </text:span><text:a xlink:type="simple" xlink:href="https://www.qad.com/manufacturing-erp" text:style-name="Internet_20_link" text:visited-style-name="Visited_20_Internet_20_Link"><text:span text:style-name="T20">üretim ERP</text:span></text:a><text:span text:style-name="T19"> sistemi, özellikle üretim sektörü için tasarlanmış olup, üretime özgü ihtiyaçlar için gelişmiş işlevsellik sunar. Üretim ERP yazılımı, temel iş süreçlerini üretim süreçleriyle entegre ederek, bir üretim işletmesi ve üretim hedefleri üzerinde tam görünürlük ve kontrol sağlar.</text:span></text:h>
      <text:p text:style-name="P19"/>
      <text:p text:style-name="P19"/>
      <text:h text:style-name="P20" text:outline-level="3"><text:soft-page-break/>Siparişe Göre Yapılandırma (CTO):Siparişe Göre Konfigürasyon (CTO), ürünlerin önceden tanımlanmış olası değerler ve/veya kombinasyonlar kümesinden seçilen müşteri gereksinimlerine göre monte edildiği ve yapılandırıldığı bir üretim sürecidir. CTO süreci, bir ürünün özelleştirilmesine olanak sağlamak için önceden ayarlanmış modüler faaliyetlere ve iş akışlarına ayrılmıştır. CTO, genellikle Tam Zamanında (JIT) tedarik stratejileriyle birlikte kullanılan Siparişe Göre Üretim (MTO)/Siparişe Göre İnşa (BTO)'nun müşteri tarafından özelleştirilebilir bir alt kümesidir.</text:h>
      <text:p text:style-name="P19"/>
      <text:h text:style-name="P18" text:outline-level="3"><text:span text:style-name="Strong_20_Emphasis"><text:span text:style-name="T18">Müşteri İlişkileri Yönetimi (CRM):</text:span></text:span><text:a xlink:type="simple" xlink:href="https://www.qad.com/blog/2019/03/metrics-that-matter-customer-service" text:style-name="Internet_20_link" text:visited-style-name="Visited_20_Internet_20_Link"><text:span text:style-name="T20">Müşteri ilişkileri yönetimi (CRM), geçmiş, mevcut ve/veya potansiyel müşterilerle olan ilişkileri ve etkileşimleri yönetme</text:span></text:a><text:span text:style-name="T19"> ilkeleri, uygulamaları, yönergeleri ve/veya süreçleridir . CRM, dış müşteri etkileşimlerini yönetmeye ve analiz etmeye, manuel olarak yoğun bilgi kaydı çabalarını azaltmaya ve </text:span><text:a xlink:type="simple" xlink:href="https://www.qad.com/solutions/complete-customer-management" text:style-name="Internet_20_link" text:visited-style-name="Visited_20_Internet_20_Link"><text:span text:style-name="T20">müşteriler ve potansiyel müşterilerle etkileşimleri iyileştirmeye</text:span></text:a><text:span text:style-name="T19"> yardımcı olmak için kullanılan yazılım verimlilik araçları ve teknolojilerini ifade eder .</text:span></text:h>
      <text:h text:style-name="P18" text:outline-level="3"><text:span text:style-name="Strong_20_Emphasis"><text:span text:style-name="T18">Sevk Listeleri (DPL):</text:span></text:span><text:span text:style-name="T19">Sevk listeleri, diğer adıyla sevk öncelik listeleri (DPL), genellikle önceliğe göre üretilmesi gereken tüm ürünlerin, varlıkların ve/veya bileşenlerin siparişlerinin bir belgesi veya listesinden oluşan bir üretim aracıdır. Sevk listeleri, miktar, öncelik, sipariş numarası, konum, parça numarası, teslim tarihleri, iş durumu ve yapılması gereken bekleyen işler de dahil olmak üzere her iş hakkında ayrıntılı bilgiler içerebilir. DPL'ler, elektronik tablolar aracılığıyla manuel olarak rapor oluşturularak oluşturulabilir, ancak artık potansiyel insan hatalarını azaltmaya yardımcı olmak için doğru raporları otomatik ve verimli bir şekilde oluşturmaya yardımcı olan yazılım araçları da mevcuttur.</text:span></text:h>
      <text:p text:style-name="P10"><text:span text:style-name="Strong_20_Emphasis"><text:span text:style-name="T4"/></text:span></text:p>
      <text:h text:style-name="P18" text:outline-level="3"><text:span text:style-name="Strong_20_Emphasis"><text:span text:style-name="T18">Elektronik Veri Değişimi (EDI):</text:span></text:span><text:span text:style-name="T19">Elektronik Veri Değişimi (EDI), işletmelerin eskiden kağıt üzerinde manuel olarak ilettiği bilgileri, iş ortakları arasında otomatik bir elektronik format kullanarak elektronik olarak iletme kavramıdır. Bu genellikle, satın alma siparişleri ve faturaların gönderilmesi/alınması gibi iş belgelerinin ve/veya bilgilerin, yazılım teknolojisi </text:span><text:a xlink:type="simple" xlink:href="https://www.qad.com/solutions/integrated-supplier-management/data-sheet/qad-cloud-edi" text:style-name="Internet_20_link" text:visited-style-name="Visited_20_Internet_20_Link"><text:span text:style-name="T20">ve</text:span></text:a><text:span text:style-name="T19"> EDI </text:span><text:a xlink:type="simple" xlink:href="https://www.qad.com/blog/2016/11/meet-edi-requirements" text:style-name="Internet_20_link" text:visited-style-name="Visited_20_Internet_20_Link"><text:span text:style-name="T20">standartları</text:span></text:a><text:span text:style-name="T19"> yardımıyla , kuruluşların ve ortakların lojistik ve iş süreçlerini daha verimli hale getirmelerine yardımcı olmak üzere, makineden makineye ve/veya bilgisayardan bilgisayara yapılan bir alışverişidir. </text:span></text:h>
      <text:h text:style-name="P18" text:outline-level="3"><text:span text:style-name="Strong_20_Emphasis"><text:span text:style-name="T18">Siparişe Göre Mühendislik (ETO):</text:span></text:span><text:span text:style-name="T19">Mühendislik Siparişi (ETO), bir ürünün sipariş alındıktan sonra tasarlandığı, mühendisliğinin yapıldığı, üretildiği ve tamamlandığı bir üretim sürecidir. Mühendislik Siparişi süreçleri genellikle, müşterinin spesifikasyonlarını karşılamak üzere tasarlanan karmaşık ve/veya özel ürünler için kullanılır. ETO modeli, birçok ürünün yenilikçi ve/veya karmaşık müşteri projeleri için tasarlandığı savunma, havacılık ve endüstriyel makine imalat sektörlerindeki özel siparişlerde yaygın olarak görülmektedir. </text:span></text:h>
      <text:p text:style-name="P10"><text:span text:style-name="Strong_20_Emphasis"><text:span text:style-name="T4"/></text:span></text:p>
      <text:p text:style-name="P10"><text:soft-page-break/><text:span text:style-name="Strong_20_Emphasis"><text:span text:style-name="T4"/></text:span></text:p>
      <text:p text:style-name="P10"><text:span text:style-name="Strong_20_Emphasis"><text:span text:style-name="T4"/></text:span></text:p>
      <text:h text:style-name="P18" text:outline-level="3"><text:span text:style-name="Strong_20_Emphasis"><text:span text:style-name="T18">Envanter Yönetimi:</text:span></text:span><text:span text:style-name="T19">Envanter yönetimi, bir şirketin tüm mallarını tedarik etme, depolama, organize etme ve izleme için kullanılan sistematik süreci ifade eder. </text:span></text:h>
      <text:p text:style-name="P10"><text:span text:style-name="Strong_20_Emphasis"><text:span text:style-name="T4"/></text:span></text:p>
      <text:h text:style-name="P18" text:outline-level="3"><text:span text:style-name="Strong_20_Emphasis"><text:span text:style-name="T22">Siparişe Göre Üretim (MTO):</text:span></text:span><text:a xlink:type="simple" xlink:href="https://blog.dys.com/mto-mts-ato/" text:style-name="Internet_20_link" text:visited-style-name="Visited_20_Internet_20_Link"><text:span text:style-name="T23">Sipariş üzerine üretim (MTO) , müşterinin ürünü kendi özelliklerine göre özelleştirip sipariş verebildiği ve ürünün ancak onaylanmış bir sipariş alındığında üretildiği bir üretim süreci ve stratejisidir. Ürünler, </text:span></text:a><text:a xlink:type="simple" xlink:href="https://www.qad.com/blog/2020/04/make-to-order-at-scale-disruptor-here-to-stay" text:style-name="Internet_20_link" text:visited-style-name="Visited_20_Internet_20_Link"><text:span text:style-name="T23">müşterinin gerçek talebine</text:span></text:a><text:span text:style-name="T24"> göre üretilir .</text:span></text:h>
      <text:h text:style-name="P18" text:outline-level="3"><text:span text:style-name="Strong_20_Emphasis"><text:span text:style-name="T25">Üretim Operasyonları Yönetimi (MOM):</text:span></text:span><text:span text:style-name="T19">Üretim Operasyonları Yönetimi (MOM), verimliliği optimize etme amacıyla uçtan uca üretim süreçlerini yönetmek için kullanılan sistemler bütünüdür. Üretim yönetimi, performans analizi, kalite ve uyumluluk ve insan makine arayüzü (HMI) dahil olmak üzere birçok MOM yazılımı türü vardır.</text:span></text:h>
      <text:h text:style-name="P18" text:outline-level="3"><text:span text:style-name="Strong_20_Emphasis"><text:span text:style-name="T25">Ana Üretim Planı (MPS):</text:span></text:span><text:span text:style-name="T19">Ana Üretim Planlaması (MPS), nihai ürünlerin üretimini değerlendirmek için kullanılan genel plandır. Bu proaktif üretim süreci, üreticilerin belirli üretim dönemlerinde hangi ürünleri, personeli, stokları ve ilgili miktarları üreteceklerini planlamalarına yardımcı olarak, mevsimselliğin, beklenmedik aksaklıkların, dalgalanan talebin ve diğer faktörlerin öngörülen etkisini yönetmelerini ve bunlara uyum sağlamalarını sağlar.</text:span></text:h>
      <text:h text:style-name="P18" text:outline-level="3"><text:span text:style-name="Strong_20_Emphasis"><text:span text:style-name="T25">SaaS (Hizmet Olarak Yazılım):</text:span></text:span><text:a xlink:type="simple" xlink:href="https://www.qad.com/blog/2019/01/the-rise-of-xaas" text:style-name="Internet_20_link" text:visited-style-name="Visited_20_Internet_20_Link"><text:span text:style-name="T20">Hizmet Olarak Yazılım (SaaS),</text:span></text:a><text:span text:style-name="T19"> yazılım veya uygulamaların internet üzerinden hizmet olarak sunulmasının bir yoludur. Kullanıcılar, eski tip yerel yazılım sistemlerini desteklemek için genellikle gerekli olan donanım/sunucular ve/veya BT kaynaklarını kurmak ve bakımını yapmak zorunda kalmadan, </text:span><text:a xlink:type="simple" xlink:href="https://www.qad.com/blog/2020/12/saas-erp-the-case-for-moving-to-the-cloud" text:style-name="Internet_20_link" text:visited-style-name="Visited_20_Internet_20_Link"><text:span text:style-name="T20">internet bağlantısı üzerinden seçtikleri uyumlu bir cihazda yazılım veya uygulamalara</text:span></text:a><text:span text:style-name="T19"> erişebilirler. </text:span></text:h>
      <text:h text:style-name="P18" text:outline-level="3"><text:span text:style-name="Strong_20_Emphasis"><text:span text:style-name="T25">Satış ve Operasyon Planlaması (S&amp;OP)</text:span></text:span></text:h>
      <text:p text:style-name="P21"><text:a xlink:type="simple" xlink:href="https://blog.dys.com/https-blog-dys-com-what-is-sop/" text:style-name="Internet_20_link" text:visited-style-name="Visited_20_Internet_20_Link"><text:span text:style-name="T26">Satış ve Operasyon Planlaması (S&amp;OP),</text:span></text:a><text:span text:style-name="T27"> arz ve talebi dengeleyen işlevsel bir iş planı oluşturmayı amaçlayan, fonksiyonlar arası bir işletme yönetimi sürecidir. Bu süreç, pazarlama, satış, üretim, </text:span><text:a xlink:type="simple" xlink:href="https://www.qad.com/blog/2018/07/inviting-finance-sop-party" text:style-name="Internet_20_link" text:visited-style-name="Visited_20_Internet_20_Link"><text:span text:style-name="T26">finans</text:span></text:a><text:span text:style-name="T27"> , yönetim ve dağıtım dahil olmak üzere geniş bir yelpazedeki girdilerden ve temel fonksiyonel alanlardan gelen temel tedarik zinciri faktörlerine odaklanır. </text:span><text:a xlink:type="simple" xlink:href="https://www.qad.com/blog/2017/03/synchronized-snop-critical" text:style-name="Internet_20_link" text:visited-style-name="Visited_20_Internet_20_Link"><text:span text:style-name="T26">Fonksiyonlar arası iş birliği,</text:span></text:a><text:span text:style-name="T27"> tüm paydaşların tahmin sürecine bağlı kalmalarını ve işletmeyi destekleyecek bir plana katkıda bulunmalarını/bağlı kalmalarını sağlar. </text:span></text:p>
      <text:h text:style-name="P18" text:outline-level="3"><text:soft-page-break/><text:span text:style-name="Strong_20_Emphasis"><text:span text:style-name="T25">Stratejik Tedarik:</text:span></text:span><text:span text:style-name="T19">Stratejik tedarik, en düşük toplam maliyetle tedarik kanalları geliştirme sürecidir ve sadece en düşük satın alma fiyatına bakmak yerine, maliyeti etkileyebilecek diğer faktörleri de dikkate alır. Bu tedarik zinciri yönetimi yaklaşımı, bilginin toplanma ve kullanılma biçimini resmileştirir ve geleneksel satın alma faaliyetlerinin ötesine geçerek, mal ve hizmetlerin şartnamesinden teslim alınmasına ve ödemesine kadar tedarik döngüsündeki tüm faaliyetleri kapsar.</text:span></text:h>
      <text:h text:style-name="P18" text:outline-level="3"><text:span text:style-name="Strong_20_Emphasis"><text:span text:style-name="T25">Tedarikçi İlişkileri Yönetimi:</text:span></text:span><text:span text:style-name="T19">Tedarikçi İlişkileri Yönetimi (SRM), tedarikçilerin varlık ve yeteneklerinin genel iş stratejisi açısından sistematik, işletme çapında değerlendirilmesi, farklı tedarikçilerle hangi faaliyetlerde bulunulacağına karar verilmesi ve tedarikçilerle tüm etkileşimlerin planlanması ve yürütülmesidir. SRM'nin odak noktası, daha yüksek düzeyde inovasyon ve rekabet avantajı sağlamak için tedarikçilerle karşılıklı fayda sağlayan ilişkiler geliştirmektir.</text:span></text:h>
      <text:h text:style-name="P18" text:outline-level="3"><text:span text:style-name="Strong_20_Emphasis"><text:span text:style-name="T25">Tedarik Zinciri Yönetimi (SCM):</text:span></text:span><text:span text:style-name="T19">Tedarik Zinciri Yönetimi (SKM), mal ve hizmet akışında yer alan operasyonların aktif yönetimidir. SKM, iş süreçlerini kolaylaştırır ve hammaddelerin nihai ürünlere dönüştürülmesi ve son müşteriye dağıtımıyla ilgili tüm süreçleri içerir. İşletmeler, gerçek zamanlı tedarik zinciri verilerini toplamak gibi SKM görevlerini otomatikleştirmek, stratejik iş birliği için </text:span><text:a xlink:type="simple" xlink:href="https://www.qad.com/solutions/connected-supply-chain" text:style-name="Internet_20_link" text:visited-style-name="Visited_20_Internet_20_Link"><text:span text:style-name="T20">tedarik zinciri sürecinin diğer bölümlerine bilgi</text:span></text:a><text:span text:style-name="T19"> aktarmak ve tedarikçiler, taşıyıcılar, müşteriler, 3PL'ler ve diğer tedarik zinciri ortaklarıyla ilişkileri sürdürmek için yazılım kullanabilirler. </text:span></text:h>
      <text:p text:style-name="P10"><text:span text:style-name="Strong_20_Emphasis"><text:span text:style-name="T28"/></text:span></text:p>
      <text:p text:style-name="P10"><draw:frame draw:style-name="fr1" draw:name="Görüntü2" text:anchor-type="char" svg:x="3.582cm" svg:y="0.275cm" svg:width="10.024cm" svg:height="10.848cm" draw:z-index="1"><draw:image xlink:href="Pictures/10000000000001180000012F7D2631F8.png" xlink:type="simple" xlink:show="embed" xlink:actuate="onLoad" draw:mime-type="image/png"/></draw:frame><text:span text:style-name="Strong_20_Emphasis"><text:span text:style-name="T28"/></text:span></text:p>
      <text:p text:style-name="P10"><text:span text:style-name="Strong_20_Emphasis"><text:span text:style-name="T29"/></text:span></text:p>
      <text:p text:style-name="P10"><text:span text:style-name="Strong_20_Emphasis"><text:span text:style-name="T29"/></text:span></text:p>
      <text:p text:style-name="P10"><text:span text:style-name="Strong_20_Emphasis"><text:span text:style-name="T29"/></text:span></text:p>
      <text:p text:style-name="P10"><text:span text:style-name="Strong_20_Emphasis"><text:span text:style-name="T29"/></text:span></text:p>
      <text:p text:style-name="P10"><text:span text:style-name="Strong_20_Emphasis"><text:span text:style-name="T29"/></text:span></text:p>
      <text:p text:style-name="P10"><text:span text:style-name="Strong_20_Emphasis"><text:span text:style-name="T29"/></text:span></text:p>
      <text:p text:style-name="P10"><text:span text:style-name="Strong_20_Emphasis"><text:span text:style-name="T29"/></text:span></text:p>
      <text:p text:style-name="P10"><text:span text:style-name="Strong_20_Emphasis"><text:span text:style-name="T29"/></text:span></text:p>
      <text:p text:style-name="P10"><text:span text:style-name="Strong_20_Emphasis"><text:span text:style-name="T29"/></text:span></text:p>
      <text:p text:style-name="P10"><text:span text:style-name="Strong_20_Emphasis"><text:span text:style-name="T29"/></text:span></text:p>
      <text:p text:style-name="P10"><text:span text:style-name="Strong_20_Emphasis"><text:span text:style-name="T29"/></text:span></text:p>
      <text:p text:style-name="P10"><text:span text:style-name="Strong_20_Emphasis"><text:span text:style-name="T29"/></text:span></text:p>
      <text:p text:style-name="P10"><text:span text:style-name="Strong_20_Emphasis"><text:span text:style-name="T29"/></text:span></text:p>
      <text:p text:style-name="P10"><text:span text:style-name="Strong_20_Emphasis"><text:span text:style-name="T29"/></text:span></text:p>
      <text:p text:style-name="P10"><text:span text:style-name="Strong_20_Emphasis"><text:span text:style-name="T29"/></text:span></text:p>
      <text:p text:style-name="P10"><text:span text:style-name="Strong_20_Emphasis"><text:span text:style-name="T29"/></text:span></text:p>
      <text:p text:style-name="P10"><text:span text:style-name="Strong_20_Emphasis"><text:span text:style-name="T29"/></text:span></text:p>
      <text:p text:style-name="P10"><text:span text:style-name="Strong_20_Emphasis"><text:span text:style-name="T29"/></text:span></text:p>
      <text:p text:style-name="P10"><text:span text:style-name="Strong_20_Emphasis"><text:span text:style-name="T29"/></text:span></text:p>
      <text:p text:style-name="P10"><text:span text:style-name="Strong_20_Emphasis"><text:span text:style-name="T29"/></text:span></text:p>
      <text:p text:style-name="P10"><text:span text:style-name="Strong_20_Emphasis"><text:span text:style-name="T29"/></text:span></text:p>
      <text:p text:style-name="P10"><text:span text:style-name="Strong_20_Emphasis"><text:span text:style-name="T29"/></text:span></text:p>
      <text:p text:style-name="P22"><text:soft-page-break/><text:span text:style-name="Strong_20_Emphasis"><text:span text:style-name="T29">MRP</text:span></text:span></text:p>
      <text:p text:style-name="P10"><text:span text:style-name="Strong_20_Emphasis"><text:span text:style-name="T29"/></text:span></text:p>
      <text:p text:style-name="P11"><text:span text:style-name="Strong_20_Emphasis"><text:span text:style-name="T30">MRP, işletmelerin malzemeye dayalı yatırımlarını en aza indirerek üretimdeki verimliliği artırmak ve alıcılara yapılan hizmetlerini geliştirmek amacıyla kullandıkları bir yönetim çizelgeleme ve kontrol tekniğidir. Çoğu işletme maliyetlerini azaltmak ve etkili bir gelişme için MRP sistemlerini kullanmaktadır.</text:span></text:span></text:p>
      <text:p text:style-name="P23">MRP sistemi, stok maliyetlerini düşürmenin yanı sıra programlama etkinliğini geliştirme ve pazardaki değişikliklere hızlı yanıtlar verebilme imkanı sunmaktadır. Bu durum işletmelerin kalite ve verimliliklerine yansıyacağından işletmeler değişen iş koşullarına ayak uydurmada ve rekabet ortamında başarı elde edeceklerdir.</text:p>
      <text:p text:style-name="P10"><text:span text:style-name="Strong_20_Emphasis"><text:span text:style-name="T29"/></text:span></text:p>
      <text:p text:style-name="P10"><text:span text:style-name="Strong_20_Emphasis"><text:span text:style-name="T30">MRP, tahmin edilemeyen veya beklenmeyen durumlar karşısında yeniden planlama ve programlama ile malzeme eksikliklerini veya fazlalıklarını önlemeyi sağlayacak kadar önceden tahmin etme yeteneğine sahiptir.</text:span></text:span><text:span text:style-name="Strong_20_Emphasis"><text:span text:style-name="T29"> </text:span></text:span></text:p>
      <text:p text:style-name="P10"><text:span text:style-name="Strong_20_Emphasis"><text:span text:style-name="T29"/></text:span></text:p>
      <text:p text:style-name="P10"><text:span text:style-name="Strong_20_Emphasis"><text:span text:style-name="T30">Şirketler satın aldıkları malzeme türlerini ve miktarlarını stratejik olarak yönetmeli, hangi ürünlerin hangi miktarlarda üretileceğini iyi planlamalı, müşterilerinin taleplerini karşılayabilmeyi minimum maliyetle mümkün kılmalıdır. Dolayısıyla stok seviyelerinin kontrolü, parçalar için önceliklerin ayarlanması ve kapasite ihtiyacının belirlenmesi MRP sisteminin üç önemli fonksiyonudur.</text:span></text:span></text:p>
      <text:p text:style-name="P10"><text:span text:style-name="Strong_20_Emphasis"><text:span text:style-name="T29"/></text:span></text:p>
      <text:p text:style-name="P10"><text:span text:style-name="Strong_20_Emphasis"><text:span text:style-name="T30">Temelde bir MRP sisteminin üç amacı vardır:</text:span></text:span></text:p>
      <text:list text:style-name="L5">
        <text:list-item>
          <text:p text:style-name="P24">Üretimi, malzemeleri, teslimat programlarını ve satın alma faaliyetlerini planlayarak üretimin verimliliğini artırmak; etkili bir satın alma yönetimi sunabilmek.</text:p>
        </text:list-item>
        <text:list-item>
          <text:p text:style-name="P24">Mağazada mümkün olan en düşük malzeme ve ürün seviyesini korumak yani envanter yatırımını en aza indirmek.</text:p>
        </text:list-item>
        <text:list-item>
          <text:p text:style-name="P24">Müşteri hizmetlerini düzenleyip geliştirmek.</text:p>
        </text:list-item>
      </text:list>
      <text:p text:style-name="P10"><text:span text:style-name="Strong_20_Emphasis"><text:span text:style-name="T31"/></text:span></text:p>
      <text:p text:style-name="P10"><text:span text:style-name="Strong_20_Emphasis"><text:span text:style-name="T31"/></text:span></text:p>
      <text:p text:style-name="P10"><text:span text:style-name="Strong_20_Emphasis"><text:span text:style-name="T31">M</text:span></text:span><text:span text:style-name="Strong_20_Emphasis"><text:span text:style-name="T30">RP sistemlerinin kullanım alanlarını 4 madde ile özetleyebiliriz:</text:span></text:span></text:p>
      <text:list text:style-name="L6">
        <text:list-item>
          <text:p text:style-name="P25">Üretim Planlaması: Üretimde gerekli malzemelerin doğru zaman ve miktarda temin edilmesini sağlar.</text:p>
        </text:list-item>
        <text:list-item>
          <text:p text:style-name="P25">Stok Yönetimi: Fazla stok veya stok eksikliği riskini minimize ederek maliyetleri düşürür.</text:p>
        </text:list-item>
        <text:list-item>
          <text:p text:style-name="P25">Tedarik Zinciri Yönetimi: Tedarikçilerle entegrasyonu kolaylaştırarak süreçleri optimize eder.</text:p>
        </text:list-item>
        <text:list-item>
          <text:p text:style-name="P25">Hizmet Sektörü: Hizmetlerde gerekli kaynak planlamasını yaparak verimliliği artırır.</text:p>
        </text:list-item>
      </text:list>
      <text:p text:style-name="P10"><text:span text:style-name="Strong_20_Emphasis"><text:span text:style-name="T29"/></text:span></text:p>
      <text:p text:style-name="P10"><text:span text:style-name="Strong_20_Emphasis"><text:span text:style-name="T29"/></text:span></text:p>
      <text:p text:style-name="P26"><text:span text:style-name="Strong_20_Emphasis"><text:span text:style-name="T32">ERP VE MRP FARKI NEDİR</text:span></text:span></text:p>
      <text:p text:style-name="P26"><text:span text:style-name="Strong_20_Emphasis"><text:span text:style-name="T32"/></text:span></text:p>
      <text:p text:style-name="P26"><text:soft-page-break/><text:span text:style-name="Strong_20_Emphasis"><text:span text:style-name="T32"/></text:span></text:p>
      <text:p text:style-name="P26"><text:span text:style-name="Strong_20_Emphasis"><text:span text:style-name="T31"> bir işletmenin bütün süreçlerinin bağlantılı ve uyum içinde yönetilmesini sağlar. ERP sistemi tüm departmanlar ile birlikte çalışan ve birbirleriyle iletişimini sağlayan geniş bir veri tabanı kullanırken, MRP daha çok neye ihtiyaç olduğu ve eldeki malzemeler ile ek olarak nelere ne zaman ihtiyaç duyulabileceğini hesaplamak gibi yöntemlere odaklanır.</text:span></text:span></text:p>
      <text:p text:style-name="P26"><text:span text:style-name="Strong_20_Emphasis"><text:span text:style-name="T32"/></text:span></text:p>
      <text:p text:style-name="P27"><text:span text:style-name="Strong_20_Emphasis"><text:span text:style-name="T33">MRP DE KULLANILAN TERİMLER</text:span></text:span></text:p>
      <text:p text:style-name="P27"><text:span text:style-name="Strong_20_Emphasis"><text:span text:style-name="T33"/></text:span></text:p>
      <text:p text:style-name="P27"><text:span text:style-name="Strong_20_Emphasis"><text:span text:style-name="T33"/></text:span></text:p>
      <text:p text:style-name="P28"><text:span text:style-name="Strong_20_Emphasis"><text:span text:style-name="T34">Ürün:</text:span></text:span><text:span text:style-name="Strong_20_Emphasis"><text:span text:style-name="T35"> MRP'de ürün, planladığınız etkinlik için kullanılan isim veya kod numarasıdır.</text:span></text:span></text:p>
      <text:p text:style-name="P28"><text:span text:style-name="Strong_20_Emphasis"><text:span text:style-name="T34">Düşük Seviye Kodu:</text:span></text:span><text:span text:style-name="Strong_20_Emphasis"><text:span text:style-name="T35"> Bu, malzeme listesindeki bir öğenin en düşük seviye kodudur ve öğeleri MRP'den geçirme sırasını gösterir. Düşük seviye kodu kullanırsınız çünkü bir MRP sistemi, bir öğenin ürün zincirinde göründüğü seviyeyi tanır ve bunu tüm sistem taleplerini karşılamak için doğru zamanı planlamak için kullanır.</text:span></text:span></text:p>
      <text:p text:style-name="P28"><text:span text:style-name="Strong_20_Emphasis"><text:span text:style-name="T34">Parti Büyüklüğü:</text:span></text:span><text:span text:style-name="Strong_20_Emphasis"><text:span text:style-name="T35"> Bu, üretim sırasında sipariş ettiğiniz birim sayısıdır.</text:span></text:span></text:p>
      <text:p text:style-name="P28"><text:span text:style-name="Strong_20_Emphasis"><text:span text:style-name="T34">Teslim Süresi (LT):</text:span></text:span><text:span text:style-name="Strong_20_Emphasis"><text:span text:style-name="T35"> Bu, bir ürünü baştan sona monte etmek veya üretmek için gereken süredir. İki tür teslim süresi vardır: sipariş teslim süresi ve üretim teslim süresi. Sipariş teslim süresi, satın alma işleminin başlatılmasından satın alınan ürünün teslim alınmasına kadar geçen süredir. Üretim teslim süresi ise, şirketin bir ürünü baştan sona tamamen üretmesi için geçen süredir.</text:span></text:span></text:p>
      <text:p text:style-name="P28"><text:span text:style-name="Strong_20_Emphasis"><text:span text:style-name="T34">Gecikmiş Vade (PD):</text:span></text:span><text:span text:style-name="Strong_20_Emphasis"><text:span text:style-name="T35"> Bu, siparişlerin planlanan sürenin gerisinde kaldığı süreyi ifade eder.</text:span></text:span></text:p>
      <text:p text:style-name="P28"><text:span text:style-name="Strong_20_Emphasis"><text:span text:style-name="T34">Brüt Gereksinimler (GR):</text:span></text:span><text:span text:style-name="Strong_20_Emphasis"><text:span text:style-name="T35"> Bu MRP hesaplamasını, üretilen birim sayısı, üretilen her birim için gerekli malzeme miktarı, mevcut stok ve sipariş edilen stok/yolda olan stok kullanılarak tahmin planlaması yoluyla oluşturursunuz. Bu, belirli bir zaman diliminde bir ürün için toplam talebi ifade eder.</text:span></text:span></text:p>
      <text:p text:style-name="P28"><text:span text:style-name="Strong_20_Emphasis"><text:span text:style-name="T34">Planlanmış Teslimatlar (SR):</text:span></text:span><text:span text:style-name="Strong_20_Emphasis"><text:span text:style-name="T35"> Bunlar, şirketin halihazırda elinde bulunan ancak henüz yerine getirmediği ürünlere ilişkin açık siparişlerdir.</text:span></text:span></text:p>
      <text:p text:style-name="P27"><text:span text:style-name="Strong_20_Emphasis"><text:span text:style-name="T33"/></text:span></text:p>
      <text:p text:style-name="P28"><text:span text:style-name="Strong_20_Emphasis"><text:span text:style-name="T34">Tahmini Stok (POH):</text:span></text:span><text:span text:style-name="Strong_20_Emphasis"><text:span text:style-name="T35"> Bu, brüt gereksinimleri karşıladıktan sonra mevcut olacağını tahmin ettiğiniz envanter miktarıdır. Bu toplamı hesaplamak için, önceki döneme ait POH'u planlanan sipariş alımlarına ve programlı sipariş alımlarına ekleyin ve ardından brüt gereksinimleri çıkarın. (Mevcut POH = Önceki POH + SR + POR – GR)</text:span></text:span></text:p>
      <text:p text:style-name="P28"><text:soft-page-break/><text:span text:style-name="Strong_20_Emphasis"><text:span text:style-name="T34">Net Gereksinimler (NR):</text:span></text:span><text:span text:style-name="Strong_20_Emphasis"><text:span text:style-name="T35"> Bu MRP hesaplamasını, brüt gereksinimler, mevcut stok ve diğer miktarları kullanarak ana planlama yoluyla oluşturursunuz. Bu, belirli bir zaman diliminde üretilmesi gereken gerçek, gerekli miktardır.</text:span></text:span></text:p>
      <text:p text:style-name="P28"><text:span text:style-name="Strong_20_Emphasis"><text:span text:style-name="T34">Planlanan Sipariş Alımları (POR):</text:span></text:span><text:span text:style-name="Strong_20_Emphasis"><text:span text:style-name="T35"> Belirli bir zaman diliminde alınması beklenen sipariş miktarı. Bu sipariş planlaması, stokların gerekli eşiğin altına düşmesini önler.</text:span></text:span></text:p>
      <text:list text:style-name="L7">
        <text:list-header>
          <text:p text:style-name="P29"><text:span text:style-name="Strong_20_Emphasis"><text:span text:style-name="T17">Planlanan Sipariş Miktarı (PORL):</text:span></text:span><text:span text:style-name="T27"> Bu, belirli bir zaman dilimi içinde sipariş etmeyi planladığınız miktardır. Bu, POR'un teslim süresiyle dengelenmiş halidir.</text:span></text:p>
          <text:p text:style-name="P29"><text:span text:style-name="Strong_20_Emphasis"><text:span text:style-name="T17">Toplam Geliştirme Süresi:</text:span></text:span><text:span text:style-name="T27"> Bu, ürünün geliştirilmesi için gereken en uzun süredir. Bunu, her bir malzeme listesine bakarak ve hangisinin en uzun sürdüğünü belirleyerek hesaplayabilirsiniz.</text:span></text:p>
          <text:p text:style-name="P30"><text:span text:style-name="Strong_20_Emphasis"><text:span text:style-name="T17">Ürün Yapısı Ağacı:</text:span></text:span><text:span text:style-name="T27"> Bu, malzeme listesinin görsel bir gösterimidir ve ürünü üretmek için her bir parçadan ve alt parçalardan kaç tane gerektiğini gösterir.</text:span></text:p>
        </text:list-header>
      </text:list>
      <text:p text:style-name="P28"><text:span text:style-name="Strong_20_Emphasis"><text:span text:style-name="T34">Net Değişim Sistemleri:</text:span></text:span><text:span text:style-name="Strong_20_Emphasis"><text:span text:style-name="T35"> Bunlar, yalnızca yeni ve eski plan arasındaki değişiklikleri belirleyen sistemlerdir.</text:span></text:span></text:p>
      <text:p text:style-name="P28"><text:span text:style-name="Strong_20_Emphasis"><text:span text:style-name="T34">Ana Üretim Planı (MPS):</text:span></text:span><text:span text:style-name="Strong_20_Emphasis"><text:span text:style-name="T35"> Bu, MRP sürecini yönlendiren nihai ürünlerin planıdır. MPS'deki miktarlar, tahmini karşılamak için üretmeniz gerekenleri temsil eder.</text:span></text:span></text:p>
      <text:p text:style-name="P28"><text:span text:style-name="Strong_20_Emphasis"><text:span text:style-name="T34">Düzensizlik:</text:span></text:span><text:span text:style-name="Strong_20_Emphasis"><text:span text:style-name="T35"> Bu, düşük veya sıfır seviyesindeki ürün/malzeme talebinin aniden yükselmesi durumudur. Düzensiz veya dengesiz talebe örnek olarak servis parçalarına duyulan ihtiyaç verilebilir. Servis parçalarına yalnızca bir cihaz bozulduğunda ihtiyaç duyulur, bu nedenle talep sürekli olmadığı için parça ihtiyacını tahmin etmek zor olabilir. </text:span></text:span></text:p>
      <text:p text:style-name="P31"><text:span text:style-name="Strong_20_Emphasis"><text:span text:style-name="T36">MRP ADIMLARI VE SÜREÇLERİ</text:span></text:span></text:p>
      <text:p text:style-name="P31"><text:span text:style-name="Strong_20_Emphasis"><text:span text:style-name="T36"/></text:span></text:p>
      <text:p text:style-name="P32"><text:span text:style-name="Strong_20_Emphasis"><text:span text:style-name="T37">MRP üç temel adımdan oluşur: </text:span></text:span></text:p>
      <text:list text:style-name="L8">
        <text:list-item>
          <text:p text:style-name="P33"><text:span text:style-name="Strong_20_Emphasis"><text:span text:style-name="T17">Miktar Gereksinimlerinin Belirlenmesi:</text:span></text:span><text:span text:style-name="T27"> Mevcut stok miktarını, açık satın alma siparişindeki miktarı, üretim için planlanan miktarı, mevcut siparişlere ayrılan miktarı ve tahmin edilen miktarı belirleyin. Bu gereksinimler her şirket ve her şirket lokasyonu için özeldir ve tarihe göre değişir.</text:span></text:p>
        </text:list-item>
        <text:list-item>
          <text:p text:style-name="P33"><text:span text:style-name="Strong_20_Emphasis"><text:span text:style-name="T17">MRP Hesaplamalarını Çalıştırma:</text:span></text:span><text:span text:style-name="T27"> Kritik, acil ve gecikmeli olarak değerlendirdiğiniz malzemeler için öneriler oluşturun.</text:span></text:p>
        </text:list-item>
        <text:list-item>
          <text:p text:style-name="P33"><text:span text:style-name="Strong_20_Emphasis"><text:span text:style-name="T17">Siparişleri Tamamlayın:</text:span></text:span><text:span text:style-name="T27"> Üretim siparişleri, satın alma siparişleri ve diğer raporlama gereksinimleri için malzemeleri belirleyin. </text:span></text:p>
        </text:list-item>
      </text:list>
      <text:p text:style-name="P34"><draw:frame draw:style-name="fr1" draw:name="Görüntü3" text:anchor-type="char" svg:x="0.751cm" svg:y="0.466cm" svg:width="14.123cm" svg:height="11.023cm" draw:z-index="2"><draw:image xlink:href="Pictures/1000000000000A00000007CEC23CCCEF.png" xlink:type="simple" xlink:show="embed" xlink:actuate="onLoad" draw:mime-type="image/png"/></draw:frame><text:soft-page-break/></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draw:frame draw:style-name="fr1" draw:name="Görüntü4" text:anchor-type="char" svg:x="1.275cm" svg:y="0.466cm" svg:width="13.005cm" svg:height="7.902cm" draw:z-index="3"><draw:image xlink:href="Pictures/10000000000003E70000025F4FE19E82.png" xlink:type="simple" xlink:show="embed" xlink:actuate="onLoad" draw:mime-type="image/png"/></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5"><text:span text:style-name="Strong_20_Emphasis"><text:span text:style-name="T38">Müşteri Siparişleri:</text:span></text:span><text:span text:style-name="T39"> Bu, müşterilerden aldığınız belirli bilgileri ifade eder ve tek seferlik siparişleri ve düzenli sipariş modellerini içerir.</text:span></text:p>
      <text:list text:style-name="L9">
        <text:list-header>
          <text:p text:style-name="P36"><text:soft-page-break/><text:span text:style-name="Strong_20_Emphasis"><text:span text:style-name="T40"/></text:span></text:p>
          <text:p text:style-name="P36"><text:span text:style-name="Strong_20_Emphasis"><text:span text:style-name="T41">Tahmini Talep:</text:span></text:span><text:span text:style-name="T42"> Bu, bir ürün veya hizmete yönelik olası talebin ne kadar olacağına dair piyasa tahminleridir. Tarihsel veriler ve mevcut trend analizine dayanmaktadır. </text:span></text:p>
        </text:list-header>
      </text:list>
      <text:p text:style-name="P35"><text:span text:style-name="Strong_20_Emphasis"><text:span text:style-name="T43"/></text:span></text:p>
      <text:p text:style-name="P35"><text:span text:style-name="Strong_20_Emphasis"><text:span text:style-name="T38">Ana Üretim Planı (MPS):</text:span></text:span><text:span text:style-name="T39"> Hem tahmini talep hem de müşteri siparişleri ana üretim planına dahil edilir. MPS, bir şirketin üretim, personel veya envanter için geliştirdiği bir plandır. Belirli bir zaman diliminde ürünleri üretmek için gereken miktarları içeren üretim gelecek planıdır. Ayrıca envanter maliyetleri, üretim maliyetleri, envanter bilgileri, tedarik, parti büyüklüğü, teslim süresi ve geliştirme kapasitesini de içerir.</text:span></text:p>
      <text:p text:style-name="P34"/>
      <text:p text:style-name="P34"/>
      <text:p text:style-name="P35"><text:span text:style-name="Strong_20_Emphasis"><text:span text:style-name="T38">Malzeme Listesi (BOM):</text:span></text:span><text:span text:style-name="T39"> Ürün yapısı dosyası olarak da adlandırılan bu belge, her bir nihai ürünü oluşturan ham maddelerin, montaj parçalarının ve bileşenlerin ayrıntılarını ve miktarlarını içerir.</text:span></text:p>
      <text:p text:style-name="P34"/>
      <text:p text:style-name="P35"><text:span text:style-name="Strong_20_Emphasis"><text:span text:style-name="T38">Stok Kayıtları:</text:span></text:span><text:span text:style-name="T39"> Bunlar, elinizde bulunan veya siparişini verdiğiniz ham maddeler ve tamamlanmış ürünlerdir. </text:span></text:p>
      <text:p text:style-name="P34"/>
      <text:p text:style-name="P35"><text:span text:style-name="Strong_20_Emphasis"><text:span text:style-name="T38">Satın Alma Siparişleri (PO):</text:span></text:span><text:span text:style-name="T39"> Bu, tedarikçilere malzeme göndermeleri için verdiğiniz siparişi içeren önerilen satın alma programıdır. PO, MPS'yi karşılamak için miktarları ve başlangıç ​​ve bitiş tarihlerini içeren bir program içerir.</text:span></text:p>
      <text:p text:style-name="P34"/>
      <text:p text:style-name="P35"><text:span text:style-name="Strong_20_Emphasis"><text:span text:style-name="T38">Malzeme Planı:</text:span></text:span><text:span text:style-name="T39"> Bu plan, son ürünlerin üretimi için gerekli ham maddeleri, montaj parçalarını ve bileşen ihtiyaçlarını miktar ve tarihlerle birlikte detaylandırır. Zaman aralıklarını belirlemek ve siparişleri kesinleştirmek için özellik ayarlarını kullanmanızı öneririz.</text:span></text:p>
      <text:p text:style-name="P34"/>
      <text:p text:style-name="P35"><text:span text:style-name="Strong_20_Emphasis"><text:span text:style-name="T38">İş Emirleri:</text:span></text:span><text:span text:style-name="T39"> Bu belge, nihai ürünün üretimine yönelik işleri, hangi departmanların hangi bölümden sorumlu olduğunu, hangi malzemelerin gerekli olduğunu ve başlangıç ​​ve bitiş tarihlerini ayrıntılı olarak belirtir.</text:span></text:p>
      <text:p text:style-name="P35"><text:span text:style-name="Strong_20_Emphasis"><text:span text:style-name="T43"/></text:span></text:p>
      <text:p text:style-name="P35"><text:span text:style-name="Strong_20_Emphasis"><text:span text:style-name="T43"/></text:span></text:p>
      <text:p text:style-name="P35"><text:soft-page-break/><text:span text:style-name="Strong_20_Emphasis"><text:span text:style-name="T38">Raporlar:</text:span></text:span><text:span text:style-name="T39"> MRP, birincil ve ikincil raporlar üretir. Birincil raporlar, yukarıda belirtilen üç raporun tamamını içerir; yani üretim ve envanter planlaması ve kontrolüyle ilgili olanlardır. İkincil raporlar ise performans kontrolü, istisna verileri (örneğin, hatalar veya gecikmiş siparişler), sapmalar ve gelecekteki envanter ve sözleşme tahminleri gibi ayrıntıları içerir.</text:span></text:p>
      <text:p text:style-name="P34"/>
      <text:p text:style-name="P34"/>
      <text:p text:style-name="P34">Değişkenler yerel envanter, sipariş büyüklüğü, yerel talep, sabit sipariş maliyetleri, değişken sipariş maliyetleri ve yerel envanter tutma maliyetleridir. MRP birçok yöntem ve hesaplama içerir. Sipariş miktarlarını bulmak için birçok yöntem kullanabilirsiniz. En popüler üç yöntem şunlardır:</text:p>
      <text:list text:style-name="L10">
        <text:list-item>
          <text:p text:style-name="P37"><text:span text:style-name="Strong_20_Emphasis"><text:span text:style-name="T40"/></text:span></text:p>
        </text:list-item>
        <text:list-item>
          <text:p text:style-name="P37"><text:span text:style-name="Strong_20_Emphasis"><text:span text:style-name="T41">Dinamik Parti Büyüklüğü Belirleme:</text:span></text:span><text:span text:style-name="T42"> Envanter teorisinde bu model, ürün talebinin zaman içinde dalgalandığını varsayar. Bu karmaşık algoritma, ekonomik sipariş miktarı modelini genelleştirir. Gerçekleştirilmesi için dinamik programlama gerektirir, bu nedenle matematikçiler aşağıdaki modelleri de geliştirmişlerdir.</text:span></text:p>
        </text:list-item>
        <text:list-item>
          <text:p text:style-name="P37"><text:span text:style-name="Strong_20_Emphasis"><text:span text:style-name="T40"/></text:span></text:p>
        </text:list-item>
        <text:list-item>
          <text:p text:style-name="P37"><text:span text:style-name="Strong_20_Emphasis"><text:span text:style-name="T41">Silver-Meal Sezgisel Algoritması:</text:span></text:span><text:span text:style-name="T42"> Bu, birim zaman başına toplam ilgili maliyeti en aza indiren, en düşük dönem maliyeti olarak da adlandırılan bir envanter kontrol algoritmasıdır. Başka bir deyişle, operasyonel gereksinimleri mümkün olan en düşük maliyetle karşılamak için gereken üretim miktarlarını hesaplamak için kullanılır. </text:span></text:p>
        </text:list-item>
        <text:list-item>
          <text:p text:style-name="P37"><text:span text:style-name="Strong_20_Emphasis"><text:span text:style-name="T40"/></text:span></text:p>
        </text:list-item>
        <text:list-item>
          <text:p text:style-name="P37"><text:span text:style-name="Strong_20_Emphasis"><text:span text:style-name="T41">En Düşük Birim Maliyet (LUC) Sezgisel Yöntemi:</text:span></text:span><text:span text:style-name="T42"> Silver-Meal'e oldukça benzer olmasına rağmen, LUC gelecekteki dönemi dönem başına ortalama maliyete göre değil, birim başına ortalama maliyete göre seçer.</text:span></text:p>
        </text:list-item>
      </text:list>
      <text:p text:style-name="P34"/>
      <text:p text:style-name="P34"/>
      <text:p text:style-name="P38"><text:span text:style-name="Strong_20_Emphasis"><text:span text:style-name="T44">KARŞILAŞILAN SORUNLAR</text:span></text:span></text:p>
      <text:p text:style-name="P38"><text:span text:style-name="Strong_20_Emphasis"><text:span text:style-name="T44"/></text:span></text:p>
      <text:p text:style-name="P38"><text:span text:style-name="Strong_20_Emphasis"><text:span text:style-name="T45">Güncel olmayan veya hatalı veriler, yanlış sonuçlar verir ve işletmenize ciddi maliyetlere yol açabilir. Envanter ve malzeme listesi (BOM) verilerini dikkatlice incelemelisiniz. Hatalar genellikle döngü sayımı ayarlamaları, giriş ve sevkiyat, hurda, hasar, atık ve üretim raporlaması sırasında meydana gelir. Barkod tarama ve çekme sistemleri bu tür hataları en aza indirebilir.</text:span></text:span></text:p>
      <text:p text:style-name="P38"><text:span text:style-name="Strong_20_Emphasis"><text:span text:style-name="T44"/></text:span></text:p>
      <text:p text:style-name="P38"><text:soft-page-break/><text:span text:style-name="Strong_20_Emphasis"><text:span text:style-name="T45">Gerekli tedarik süresi ürüne bağlı olarak değişebilir. MRP, tedarik, gerekli miktarlar veya diğer ürünlerin olası eş zamanlı üretimi değişikliklerinden bağımsız olarak, her ürün için tedarik süresinin her zaman aynı olduğunu varsayar.</text:span></text:span></text:p>
      <text:p text:style-name="P38"><text:span text:style-name="Strong_20_Emphasis"><text:span text:style-name="T44"/></text:span></text:p>
      <text:p text:style-name="P39"><text:span text:style-name="Strong_20_Emphasis"><text:span text:style-name="T45"/></text:span></text:p>
      <text:p text:style-name="P39"><text:span text:style-name="Strong_20_Emphasis"><text:span text:style-name="T45"/></text:span></text:p>
      <text:p text:style-name="P39"><text:span text:style-name="Strong_20_Emphasis"><text:span text:style-name="T45">Veri bütünlüğü sorunlarınızı çözmek yoğun bir çaba gerektirebilir. MRP sürecinize başlamadan önce verilerinizin yüksek kalitede olmasını sağlamak için en iyi uygulamalar şunlardır:</text:span></text:span></text:p>
      <text:list text:style-name="L11">
        <text:list-item>
          <text:p text:style-name="P40">Stok yenileme ve ürün envanterine giriş yapmak için barkod tarama veya çekme sistemi kullanmak.</text:p>
        </text:list-item>
        <text:list-item>
          <text:p text:style-name="P40">Sevkiyat işlemlerinin konteyner etiketlerini doğru şekilde yazdırdığından emin olmak.</text:p>
        </text:list-item>
        <text:list-item>
          <text:p text:style-name="P40">Tedarikçilerinizden, etiketleme sistemine entegre edilecek önceden sevkiyat bildirimleri (ASN) talep edin. Eksiklikleri ve fazla sevkiyatları tespit etmek için, ürün geldiğinde etiketleri şirket içi numaralarla eşleştirin. </text:p>
        </text:list-item>
        <text:list-item>
          <text:p text:style-name="P40">Hurda kayıtlarını günlük olarak tutma</text:p>
        </text:list-item>
        <text:list-item>
          <text:p text:style-name="P40">Envanterinizi yanlış şekilde değiştiren döngü sayımlarının nedenlerini giderme ve düzeltme </text:p>
        </text:list-item>
        <text:list-item>
          <text:p text:style-name="P40">Üretim sahasında malzeme listesinin doğrulanması</text:p>
        </text:list-item>
      </text:list>
      <text:p text:style-name="P38"><text:span text:style-name="Strong_20_Emphasis"><text:span text:style-name="T44">ÜRETİM KAYNAK PLANLAMASI NEDİR</text:span></text:span></text:p>
      <text:p text:style-name="P38"><text:span text:style-name="Strong_20_Emphasis"><text:span text:style-name="T44"/></text:span></text:p>
      <text:p text:style-name="P38"><text:span text:style-name="Strong_20_Emphasis"><text:span text:style-name="T45">Üretim sektörüne özgü bir yöntem ise üretim kaynak planlaması (MRP II)'dir. MRP II, MRP'nin prensiplerini alır ve şirketlere kapsamlı bir üretim planı sunmak için kaba kapasite planlaması ve kapasite gereksinim planlaması (CRP) gibi bazı ek alanlar ekler. CRP, üretim siparişine göre her bir işlem için yükü belirleyen bir muhasebe yöntemidir. CRP, MRP'den veri alır. </text:span></text:span><text:span text:style-name="T45"/></text:p>
      <text:p text:style-name="P38"><text:span text:style-name="Strong_20_Emphasis"><text:span text:style-name="T44"/></text:span></text:p>
      <text:p text:style-name="P39"><text:span text:style-name="Strong_20_Emphasis"><text:span text:style-name="T45"><text:line-break/>MRP II yalnızca hesaplama ihtiyaçlarıyla ilgili değildir, birçok biçim alabilen bir yönetim konseptidir. MRP II, planlamayı uzun vadeli, orta vadeli ve kısa vadeli olarak bölen bir hiyerarşi içinde çalışır. MRP II'nin üç ana özelliği şunlardır: </text:span></text:span></text:p>
      <text:list text:style-name="L12">
        <text:list-item>
          <text:p text:style-name="P41">Şirket genelinde bir sistem</text:p>
        </text:list-item>
        <text:list-item>
          <text:p text:style-name="P41">Finansal ve operasyonel olarak entegre bir sistem</text:p>
        </text:list-item>
        <text:list-item>
          <text:p text:style-name="P41"><text:soft-page-break/>Bir şeyleri yapmanın farklı yollarını gösteren "ya şöyle olsaydı" senaryoları gerçekleştirebilen bir sistem.</text:p>
        </text:list-item>
      </text:list>
      <text:p text:style-name="P42">MRP II, girilen verilerin kalitesine ve zamanlamasına da bağlıdır. Yanlış bilgiler veya sürekli teslimat süresi dalgalanmaları, kötü planlamaya yol açar. Bu planlar, uygulama başarısızlığına ve hatta yeniden uygulamaya neden olabilir. </text:p>
      <text:p text:style-name="P38"><text:span text:style-name="Strong_20_Emphasis"><text:span text:style-name="T44"/></text:span></text:p>
      <text:p text:style-name="P38"><text:span text:style-name="Strong_20_Emphasis"><text:span text:style-name="T44">DRP NEDİR</text:span></text:span></text:p>
      <text:p text:style-name="P38"><text:span text:style-name="Strong_20_Emphasis"><text:span text:style-name="T44"/></text:span></text:p>
      <text:p text:style-name="P38"><text:span text:style-name="Strong_20_Emphasis"><text:span text:style-name="T45">Dağıtım gereksinimleri planlaması (DRP), diğer adıyla dağıtım ikmal planlaması, 1981 yılında ortaya çıkan MRP mantığının bir devamıdır. DRP, MRP'yi bir adım öteye taşıyarak malzemelerin tesisten nasıl çıkarılacağını hesaplar. DRP, her bir mal türünün teslimat gerektiren miktarını ve talebin nerede karşılanacağını hesapladığı için ürün teslimatı daha verimlidir. DRP, düşük olma olasılığı yüksek olan envanterin bir ikmal planına sahip olmasını garanti eden zamana dayalı bir yaklaşımdır. DRP, MRP'ye benzer ancak itme veya çekme sistemiyle çalışabilir. 1990'larda ortaya çıktığında ERP bu işlevi devraldı. Şimdi, DRP hala bağımsız bir sistem olabilir veya bir ERP sistemi içinde bir modül olarak çalışabilir. </text:span></text:span></text:p>
      <text:p text:style-name="P38"><text:span text:style-name="Strong_20_Emphasis"><text:span text:style-name="T44"/></text:span></text:p>
      <text:p text:style-name="P38"><text:span text:style-name="Strong_20_Emphasis"><text:span text:style-name="T44"/></text:span></text:p>
      <text:p text:style-name="P38"><text:span text:style-name="Strong_20_Emphasis"><text:span text:style-name="T44"/></text:span></text:p>
      <text:p text:style-name="P38"><text:span text:style-name="Strong_20_Emphasis"><text:span text:style-name="T44"/></text:span></text:p>
      <text:p text:style-name="P38"><text:span text:style-name="Strong_20_Emphasis"><text:span text:style-name="T44">ÜRETİM PLANLAMASI <text:s/>NEDİR</text:span></text:span></text:p>
      <text:p text:style-name="P38"><text:span text:style-name="Strong_20_Emphasis"><text:span text:style-name="T44"/></text:span></text:p>
      <text:p text:style-name="P39"><text:span text:style-name="Strong_20_Emphasis"><text:span text:style-name="T45">Üretim planlaması, bir imalat işletmesinde ürünlerin zamanında üretilmesi için yeterli hammadde bulunmasını sağlayan süreçtir. MRP'den daha gelişmiş olan bu sistem, MRP'nin işlevselliğini genişletir. MRP'nin bazı eksikliklerini gidermek için geliştirilen üretim planlaması, MRP'yi şu şekillerde geliştirir:</text:span></text:span></text:p>
      <text:list text:style-name="L13">
        <text:list-item>
          <text:p text:style-name="P43">MRP üretimde herhangi bir sınırlama varsaymazken, üretim planlaması üretimdeki tüm kısıtlamaları dikkate alır.</text:p>
        </text:list-item>
        <text:list-item>
          <text:p text:style-name="P43">Üretim planlaması, en karlı işlere öncelik verir ve ilk önce onları tamamlar.</text:p>
        </text:list-item>
        <text:list-item>
          <text:p text:style-name="P43">Üretim planlaması, sipariş edilen parçanın teslim süresini dikkate alır.</text:p>
        </text:list-item>
        <text:list-item>
          <text:p text:style-name="P43">Üretim planlaması daha karmaşık algoritmalar kullanır.</text:p>
        </text:list-item>
      </text:list>
      <text:p text:style-name="P44"><text:span text:style-name="Strong_20_Emphasis"><text:span text:style-name="T46">PRODUCT DATA MANAGMENT <text:s text:c="2"/>PDM</text:span></text:span></text:p>
      <text:p text:style-name="P44"><text:span text:style-name="Strong_20_Emphasis"><text:span text:style-name="T46"/></text:span></text:p>
      <text:p text:style-name="P44"><text:span text:style-name="Strong_20_Emphasis"><text:span text:style-name="T47">Ürün veri yönetimi, belirli bir ürünle ilgili verileri izlemek ve kontrol etmek için yazılım veya diğer araçların kullanılmasıdır. İzlenen veriler genellikle ürünün teknik özelliklerini, üretim ve geliştirme özelliklerini ve malların üretimi için gerekli olacak malzeme türlerini içerir. Ürün veri yönetimi, bir şirketin bir ürünün oluşturulması ve piyasaya sürülmesiyle ilgili çeşitli maliyetleri izlemesine olanak tanır. Ürün veri </text:span></text:span><text:soft-page-break/><text:span text:style-name="Strong_20_Emphasis"><text:span text:style-name="T47">yönetimi, ürün yaşam döngüsü yönetimi ve </text:span></text:span><text:a xlink:type="simple" xlink:href="https://en.wikipedia.org/wiki/Configuration_management" text:style-name="Internet_20_link" text:visited-style-name="Visited_20_Internet_20_Link"><text:span text:style-name="Strong_20_Emphasis"><text:span text:style-name="T48">konfigürasyon yönetiminin</text:span></text:span></text:a><text:span text:style-name="Strong_20_Emphasis"><text:span text:style-name="T47"> bir parçasıdır ve öncelikle mühendisler tarafından kullanılır.</text:span></text:span></text:p>
      <text:p text:style-name="P44"><text:span text:style-name="Strong_20_Emphasis"><text:span text:style-name="T46"/></text:span></text:p>
      <text:p text:style-name="P44"><text:span text:style-name="Strong_20_Emphasis"><text:span text:style-name="T47">PDM (Ürün Veri Yönetimi) kapsamında odak noktası, bir ürünle ilgili tüm bilgilerin oluşturulması, değiştirilmesi ve arşivlenmesinin yönetimi ve takibidir. Depolanan ve yönetilen bilgiler (bir veya daha fazla dosya sunucusunda) </text:span></text:span><text:a xlink:type="simple" xlink:href="https://en.wikipedia.org/wiki/Computer-aided_design" text:style-name="Internet_20_link" text:visited-style-name="Visited_20_Internet_20_Link"><text:span text:style-name="Strong_20_Emphasis"><text:span text:style-name="T48">bilgisayar destekli tasarım</text:span></text:span></text:a><text:span text:style-name="Strong_20_Emphasis"><text:span text:style-name="T47"> (CAD) modelleri, çizimler ve bunlarla ilişkili belgeler gibi mühendislik verilerini içerecektir.</text:span></text:span></text:p>
      <text:p text:style-name="P44"><text:span text:style-name="Strong_20_Emphasis"><text:span text:style-name="T46"/></text:span></text:p>
      <text:p text:style-name="P44"><text:span text:style-name="Strong_20_Emphasis"><text:span text:style-name="T47">Ürün veri yönetimi (PDM), süreç ve ürün geçmişi için merkezi bir bilgi deposu görevi görür ve proje yöneticileri, mühendisler, satış elemanları, alıcılar ve kalite güvence ekipleri de dahil olmak üzere ürünlerle etkileşimde bulunan tüm iş kullanıcıları arasında entegrasyonu ve veri alışverişini teşvik eder.</text:span></text:span></text:p>
      <text:p text:style-name="P44"><text:span text:style-name="Strong_20_Emphasis"><text:span text:style-name="T46"/></text:span></text:p>
      <text:p text:style-name="P44"><text:span text:style-name="Strong_20_Emphasis"><text:span text:style-name="T47">Merkezi veritabanı ayrıca dosya sahibi ve bileşenlerin sürüm durumu gibi </text:span></text:span><text:a xlink:type="simple" xlink:href="https://en.wikipedia.org/wiki/Metadata" text:style-name="Internet_20_link" text:visited-style-name="Visited_20_Internet_20_Link"><text:span text:style-name="Strong_20_Emphasis"><text:span text:style-name="T48">meta verileri</text:span></text:span></text:a><text:span text:style-name="Strong_20_Emphasis"><text:span text:style-name="T47"> de yönetecektir . Paket, ürün verilerinin çok kullanıcılı sisteme giriş ve çıkışını kontrol edecek; bir üründeki tüm bileşenlerin sürümleri/sayıları üzerinde </text:span></text:span><text:a xlink:type="simple" xlink:href="https://en.wikipedia.org/wiki/Change_management_(engineering)" text:style-name="Internet_20_link" text:visited-style-name="Visited_20_Internet_20_Link"><text:span text:style-name="Strong_20_Emphasis"><text:span text:style-name="T49">mühendislik değişiklik yönetimi ve sürüm kontrolü gerçekleştirecek; montajlar için ürün yapısı </text:span></text:span></text:a><text:a xlink:type="simple" xlink:href="https://en.wikipedia.org/wiki/Bill_of_materials" text:style-name="Internet_20_link" text:visited-style-name="Visited_20_Internet_20_Link"><text:span text:style-name="Strong_20_Emphasis"><text:span text:style-name="T49">malzeme listesini</text:span></text:span></text:a><text:span text:style-name="Strong_20_Emphasis"><text:span text:style-name="T47"> (BOM) oluşturacak ve düzenleyecek; ve ürün varyantlarının konfigürasyon yönetiminde yardımcı olacaktır.</text:span></text:span></text:p>
      <text:p text:style-name="P44"><text:span text:style-name="Strong_20_Emphasis"><text:span text:style-name="T46"/></text:span></text:p>
      <text:p text:style-name="P44"><text:span text:style-name="Strong_20_Emphasis"><text:span text:style-name="T46"/></text:span></text:p>
      <text:p text:style-name="P45"><text:a xlink:type="simple" xlink:href="https://en.wikipedia.org/wiki/Product_lifecycle_management" text:style-name="Internet_20_link" text:visited-style-name="Visited_20_Internet_20_Link"><text:span text:style-name="Strong_20_Emphasis"><text:span text:style-name="T48">Bu, ürün maliyetleri vb. konularda otomatik raporlar oluşturulmasını sağlar. Ayrıca, PDM, karmaşık ürünler üreten şirketlerin ürün verilerini tüm PLM</text:span></text:span></text:a><text:span text:style-name="Strong_20_Emphasis"><text:span text:style-name="T47"> lansman sürecine yaymalarını mümkün kılar . Bu da lansman sürecinin etkinliğini önemli ölçüde artırır.</text:span></text:span></text:p>
      <text:p text:style-name="P46">Ürün veri yönetimi, ürünlerin ve/veya hizmetlerin geliştirilmesi ve kullanım ömrü boyunca bu ürünler ve/veya hizmetler hakkında bilgi toplama ve sürdürmeye odaklanır. PDM modülü içinde yönetilen tipik bilgiler şunlardır:</text:p>
      <text:list text:style-name="L14">
        <text:list-item>
          <text:p text:style-name="P47">Marka adı</text:p>
        </text:list-item>
        <text:list-item>
          <text:p text:style-name="P47">Parça numarası</text:p>
        </text:list-item>
        <text:list-item>
          <text:p text:style-name="P47">Parça açıklaması</text:p>
        </text:list-item>
        <text:list-item>
          <text:p text:style-name="P47">Tedarikçi/satıcı</text:p>
        </text:list-item>
        <text:list-item>
          <text:p text:style-name="P47">Tedarikçi parça numarası ve açıklaması</text:p>
        </text:list-item>
        <text:list-item>
          <text:p text:style-name="P47">Ölçü birimi</text:p>
        </text:list-item>
        <text:list-item>
          <text:p text:style-name="P47">Maliyet/fiyat</text:p>
        </text:list-item>
        <text:list-item>
          <text:p text:style-name="P47">Şematik veya CAD çizimi</text:p>
        </text:list-item>
        <text:list-item>
          <text:p text:style-name="P47">Malzeme veri sayfaları</text:p>
        </text:list-item>
      </text:list>
      <text:p text:style-name="P44"><text:span text:style-name="Strong_20_Emphasis"><text:span text:style-name="T46"/></text:span></text:p>
      <text:p text:style-name="P44"><draw:frame draw:style-name="fr2" draw:name="Görüntü5" text:anchor-type="char" svg:width="17cm" svg:height="8.505cm" draw:z-index="4"><draw:image xlink:href="Pictures/1000000000000780000004382910415F.png" xlink:type="simple" xlink:show="embed" xlink:actuate="onLoad" draw:mime-type="image/png"/></draw:frame><text:soft-page-break/><text:span text:style-name="Strong_20_Emphasis"><text:span text:style-name="T46"/></text:span></text:p>
      <text:p text:style-name="P44"><text:span text:style-name="Strong_20_Emphasis"><text:span text:style-name="T46">PLM NEDİR</text:span></text:span></text:p>
      <text:p text:style-name="P45"><text:a xlink:type="simple" xlink:href="https://www.oracle.com/tr/scm/product-lifecycle-management/" text:style-name="Internet_20_link" text:visited-style-name="Visited_20_Internet_20_Link"><text:span text:style-name="Strong_20_Emphasis"><text:span text:style-name="T46"/></text:span></text:a></text:p>
      <text:p text:style-name="P45"><text:a xlink:type="simple" xlink:href="https://www.oracle.com/tr/scm/product-lifecycle-management/" text:style-name="Internet_20_link" text:visited-style-name="Visited_20_Internet_20_Link"><text:span text:style-name="Strong_20_Emphasis"><text:span text:style-name="T50">PLM yazılımı</text:span></text:span></text:a><text:span text:style-name="Strong_20_Emphasis"><text:span text:style-name="T46">, globalleştirilmiş tedarik zincirleri genelinde bir ürün veya hizmet yaşam döngüsünün her adımında tüm bilgileri ve süreçleri yöneten bir çözümdür. Buna kalemler, parçalar, ürünler, dokümanlar, gereksinimler, mühendislik değişiklik emirleri ve kalite iş akışları dahildir.</text:span></text:span></text:p>
      <text:p text:style-name="P48">Günümüzde tedarik zincirleri daha küresel bir hal aldı ve işletmeler işletme modellerini değiştiriyor. Örneğin, birçok şirket yeni ürün veya hizmetler satmak için ürün hizmeti (PaaS) gibi gömülü yazılım hizmetleri kullanıyor. Sonuç olarak bu kuruluşlar, uyarlanabilir ve duyarlı olmalarına yardımcı olmaya hazır bulut tabanlı bir PLM yazılımına ihtiyaçları olduğunu fark ediyor.</text:p>
      <text:p text:style-name="P48">Modern PLM yazılımı, bütünsel bir ürün geliştirme ve tedarik zinciri stratejisi için dijital temel ve kurumsal ürün kaydı sağladığından iş dönüşümüne hızla bağlanıyor. İş süreçleriniz tek bir platformda bugünün PLM yazılımıyla uyumlu hale getirildiğinde, ürün değer zincirinizi entegre iş planlama ve tedarik zinciri yürütme ile birleştirerek daha hızlı inovasyonlara yön vermeyi ve ürünlerin nasıl tasarlandığını, üretildiğini, saklandığını ve hizmet edildiğini iyileştirmeyi sağlayabilirsiniz.</text:p>
      <text:p text:style-name="P49"><text:bookmark text:name="the-five-phases-of-product-development"/><text:span text:style-name="Strong_20_Emphasis"><text:span text:style-name="T51">Ürün geliştirmenin beş aşaması</text:span></text:span></text:p>
      <text:p text:style-name="P49"><text:span text:style-name="Strong_20_Emphasis"><text:span text:style-name="T46"/></text:span></text:p>
      <text:p text:style-name="P49"><draw:frame draw:style-name="fr1" draw:name="Görüntü6" text:anchor-type="char" svg:x="0.053cm" svg:y="-0.318cm" svg:width="17cm" svg:height="4.8cm" draw:z-index="5"><draw:image xlink:href="Pictures/10000000000007BF00000230DB3822D1.png" xlink:type="simple" xlink:show="embed" xlink:actuate="onLoad" draw:mime-type="image/png"/></draw:frame><text:soft-page-break/><text:span text:style-name="Strong_20_Emphasis"><text:span text:style-name="T52">Konsept ve tasarım:</text:span></text:span><text:span text:style-name="Strong_20_Emphasis"><text:span text:style-name="T46"> Rakip analizi, pazardaki boşluklar veya müşteri ihtiyaçları gibi faktörlere dayanarak bir ürünün gereksinimlerinin tanımlandığı fikir oluşturma aşaması.</text:span></text:span></text:p>
      <text:list text:style-name="L15">
        <text:list-item>
          <text:p text:style-name="P50"><text:span text:style-name="Strong_20_Emphasis"><text:span text:style-name="T53">Geliştirme:</text:span></text:span><text:span text:style-name="T53"> Ürünün detaylı tasarımı ve gerekli tüm araç tasarımları oluşturulacaktır. Bu aşama, planlanan ürünün doğrulanması ve analizinin yanı sıra prototip geliştirme ve saha denemelerini de içerir. Bu, ürünün nasıl kullanıldığı ve hangi ek iyileştirmelerin gerekli olduğu konusunda hayati geri bildirimler üretir.</text:span></text:p>
        </text:list-item>
        <text:list-item>
          <text:p text:style-name="P50"><text:span text:style-name="Strong_20_Emphasis"><text:span text:style-name="T53">Üretim ve lansman:</text:span></text:span><text:span text:style-name="T53"> Pilot uygulamadan gelen geri bildirimler, pazara hazır bir sürüm üretmek için tasarım ve diğer bileşenlerde ayarlamalar yapmak amacıyla kullanılır. Yeni ürünün üretimi ölçeklendirilir, ardından piyasaya sürülür ve dağıtımı yapılır.</text:span></text:p>
        </text:list-item>
        <text:list-item>
          <text:p text:style-name="P50"><text:span text:style-name="Strong_20_Emphasis"><text:span text:style-name="T53">Servis ve destek:</text:span></text:span><text:span text:style-name="T53"> Yeni ürünün piyasaya sürülmesinin ardından, servis ve desteğin sunulduğu süre.</text:span></text:p>
        </text:list-item>
        <text:list-item>
          <text:p text:style-name="P51"><text:span text:style-name="Strong_20_Emphasis"><text:span text:style-name="T53">Emeklilik:</text:span></text:span><text:span text:style-name="T53"> Ürünün yaşam döngüsünün sonunda, piyasadan çekilmesi; yeniden denemeler veya yeni konsept fikirlerine entegrasyonu da dahil olmak üzere, yönetilmesi gereken bir süreçtir.</text:span></text:p>
        </text:list-item>
      </text:list>
      <text:p text:style-name="P52"><text:span text:style-name="Strong_20_Emphasis"><text:span text:style-name="T54"/></text:span></text:p>
      <text:p text:style-name="P52"><text:span text:style-name="Strong_20_Emphasis"><text:span text:style-name="T54"/></text:span></text:p>
      <text:p text:style-name="P52"><text:span text:style-name="Strong_20_Emphasis"><text:span text:style-name="T54"/></text:span></text:p>
      <text:p text:style-name="P52"><text:span text:style-name="Strong_20_Emphasis"><text:span text:style-name="T54"/></text:span></text:p>
      <text:p text:style-name="P52"><text:span text:style-name="Strong_20_Emphasis"><text:span text:style-name="T54"/></text:span></text:p>
      <text:p text:style-name="P52"><text:span text:style-name="Strong_20_Emphasis"><text:span text:style-name="T54">NASIL ÇALIŞIR</text:span></text:span></text:p>
      <text:p text:style-name="P52"><text:span text:style-name="Strong_20_Emphasis"><text:span text:style-name="T54">Bir PLM sistemi, tasarımcılara ve mühendislere ihtiyaç duydukları kritik verilere gerçek zamanlı erişim sağlar. Sistem, CAD (bilgisayar destekli tasarım) verilerini malzeme listesi ve </text:span></text:span><text:a xlink:type="simple" xlink:href="https://www.sap.com/resources/what-is-erp" text:style-name="Internet_20_link" text:visited-style-name="Visited_20_Internet_20_Link"><text:span text:style-name="Strong_20_Emphasis"><text:span text:style-name="T54">ERP</text:span></text:span></text:a><text:span text:style-name="Strong_20_Emphasis"><text:span text:style-name="T54"> sistemiyle entegrasyon gibi diğer kurumsal veri kaynaklarıyla ilişkilendirerek proje yönetimini kolaylaştırır ve bu ürün verilerini ürün geliştirme yaşam döngüsünün tüm aşamalarında yönetir.</text:span></text:span></text:p>
      <text:p text:style-name="P53"><text:soft-page-break/>PLM ayrıca tasarımcıların ve mühendislerin birbirinden kopuk bir ortamda çalışmasını önleyerek, onlara mevcut ürünler hakkında müşteri ve analist geri bildirimleri, sahadaki ürünlerin performans verileri ve üretim gibi sonraki süreçlerin sınırlamalarına ilişkin görünürlük gibi dış bilgi kaynaklarına erişim imkanı sağlar.</text:p>
      <text:p text:style-name="P53">PLM sistemi, tasarım ve mühendislik ekiplerinin ötesinde de faydalar sağlar. İş paydaşlarına ve/veya tedarikçilere, ürün geliştirme sürecinin başlarında kolayca geri bildirim iletebilmeleri için 'tek doğru bilgi kaynağı' görünürlüğü sunabilir.</text:p>
      <text:p text:style-name="P52"><text:span text:style-name="Strong_20_Emphasis"><text:span text:style-name="T54"/></text:span></text:p>
      <text:p text:style-name="P52"><draw:frame draw:style-name="fr1" draw:name="Görüntü7" text:anchor-type="char" svg:x="0.801cm" svg:y="-0.143cm" svg:width="12.435cm" svg:height="11.324cm" draw:z-index="6"><draw:image xlink:href="Pictures/10000000000001D6000001AC15DE8FE7.png" xlink:type="simple" xlink:show="embed" xlink:actuate="onLoad" draw:mime-type="image/png"/></draw:frame><text:span text:style-name="Strong_20_Emphasis"><text:span text:style-name="T54"/></text:span></text:p>
      <text:p text:style-name="P52"><text:span text:style-name="Strong_20_Emphasis"><text:span text:style-name="T54"/></text:span></text:p>
      <text:p text:style-name="P52"><text:span text:style-name="Strong_20_Emphasis"><text:span text:style-name="T54"/></text:span></text:p>
      <text:p text:style-name="P52"><text:span text:style-name="Strong_20_Emphasis"><text:span text:style-name="T54"/></text:span></text:p>
      <text:p text:style-name="P52"><text:span text:style-name="Strong_20_Emphasis"><text:span text:style-name="T54"/></text:span></text:p>
      <text:p text:style-name="P52"><text:span text:style-name="Strong_20_Emphasis"><text:span text:style-name="T54"/></text:span></text:p>
      <text:p text:style-name="P52"><text:span text:style-name="Strong_20_Emphasis"><text:span text:style-name="T54"/></text:span></text:p>
      <text:p text:style-name="P52"><text:span text:style-name="Strong_20_Emphasis"><text:span text:style-name="T54"/></text:span></text:p>
      <text:p text:style-name="P52"><text:span text:style-name="Strong_20_Emphasis"><text:span text:style-name="T54"/></text:span></text:p>
      <text:p text:style-name="P52"><text:span text:style-name="Strong_20_Emphasis"><text:span text:style-name="T54"/></text:span></text:p>
      <text:p text:style-name="P52"><text:span text:style-name="Strong_20_Emphasis"><text:span text:style-name="T54"/></text:span></text:p>
      <text:p text:style-name="P52"><text:span text:style-name="Strong_20_Emphasis"><text:span text:style-name="T54"/></text:span></text:p>
      <text:p text:style-name="P52"><text:span text:style-name="Strong_20_Emphasis"><text:span text:style-name="T54"/></text:span></text:p>
      <text:p text:style-name="P52"><text:span text:style-name="Strong_20_Emphasis"><text:span text:style-name="T54"/></text:span></text:p>
      <text:p text:style-name="P52"><text:span text:style-name="Strong_20_Emphasis"><text:span text:style-name="T54"/></text:span></text:p>
      <text:p text:style-name="P52"><text:span text:style-name="Strong_20_Emphasis"><text:span text:style-name="T54"/></text:span></text:p>
      <text:p text:style-name="P52"><text:span text:style-name="Strong_20_Emphasis"><text:span text:style-name="T54"/></text:span></text:p>
      <text:p text:style-name="P52"><text:span text:style-name="Strong_20_Emphasis"><text:span text:style-name="T54"/></text:span></text:p>
      <text:p text:style-name="P52"><text:span text:style-name="Strong_20_Emphasis"><text:span text:style-name="T54">PDM VE PDL FARKI NEDİR</text:span></text:span></text:p>
      <text:p text:style-name="P52"><text:span text:style-name="Strong_20_Emphasis"><text:span text:style-name="T54"/></text:span></text:p>
      <text:p text:style-name="P52"><text:span text:style-name="Strong_20_Emphasis"><text:span text:style-name="T55">PDM, adından da anlaşılacağı gibi, özellikle tasarım ve mühendislik aşamalarında ürün verilerini organize etmeye, merkezileştirmeye, senkronize etmeye ve yönetmeye odaklanmıştır. Dijital </text:span></text:span><text:a xlink:type="simple" xlink:href="https://www.ptc.com/en/industry-insights/digital-thread" text:style-name="Internet_20_link" text:visited-style-name="Visited_20_Internet_20_Link"><text:span text:style-name="Strong_20_Emphasis"><text:span text:style-name="T56">akışın</text:span></text:span></text:a><text:span text:style-name="Strong_20_Emphasis"><text:span text:style-name="T55"> temeli olan PLM ise çok daha geniş bir kapsama alanına </text:span></text:span><text:soft-page-break/><text:span text:style-name="Strong_20_Emphasis"><text:span text:style-name="T55">sahiptir ve bu nedenle tüm işletme üzerinde daha fazla etkiye ve öneme sahiptir. PLM genellikle daha büyük, uçtan uca yaşam döngüsü çerçevesi içinde PDM'yi içerir veya entegre eder.</text:span></text:span><text:span text:style-name="Strong_20_Emphasis"><text:span text:style-name="T54"> </text:span></text:span></text:p>
      <text:p text:style-name="P52"><draw:frame draw:style-name="fr3" draw:name="Görüntü8" text:anchor-type="char" svg:x="0cm" svg:y="0.543cm" svg:width="17cm" svg:height="10.624cm" draw:z-index="7"><draw:image xlink:href="Pictures/10000000000004B000000320D5AFC3BE.png" xlink:type="simple" xlink:show="embed" xlink:actuate="onLoad" draw:mime-type="image/png"/></draw:frame><text:span text:style-name="Strong_20_Emphasis"><text:span text:style-name="T54"/></text:span></text:p>
      <text:p text:style-name="P54"><text:span text:style-name="Strong_20_Emphasis"><text:span text:style-name="T57">CRM NEDİR</text:span></text:span></text:p>
      <text:p text:style-name="P54"><text:span text:style-name="Strong_20_Emphasis"><text:span text:style-name="T57">CRM sistemi, müşteri bilgileri, şirket temsilcileriyle etkileşimler, satın almalar, hizmet talepleri, varlıklar ve teklifler dahil olmak üzere, müşteriyle ilgili tüm verileri toplar, bağlar ve analiz eder. Ardından sistem, kullanıcıların bu verilere erişmesine olanak tanır ve her bir temas noktasında neler olduğunu anlar. Bu anlayış sayesinde, eksiksiz bir müşteri profili geliştirilir ve müşteriyle güçlü bir ilişki kurulur.</text:span></text:span></text:p>
      <text:p text:style-name="P55"><text:span text:style-name="T58">Müşteri verileri; satış teşviklendirme modellemesi, satış tahmini, bölge segmentasyonu, kampanya tasarımı, ürün inovasyonu ve diğer satış, pazarlama ve müşteri hizmetleri etkinliklerinde kullanılmak üzere de toplanabilir. CRM araçları ve yazılımları; müşteri etkileşim sürecini hızlandırmanıza, daha fazla satış anlaşmasını sonlandırmanıza, müşterilerinizle güçlü ilişkiler kurmanıza, müşteri sadakati oluşturmanıza, en nihayetinde satışları ve kârları artırmanıza yardımcı olur.</text:span></text:p>
      <text:p text:style-name="P54"><draw:frame draw:style-name="fr1" draw:name="Görüntü10" text:anchor-type="char" svg:x="8.236cm" svg:y="0.293cm" svg:width="9.444cm" svg:height="9.444cm" draw:z-index="9"><draw:image xlink:href="Pictures/100000010000027000000270FCFEEFBE.png" xlink:type="simple" xlink:show="embed" xlink:actuate="onLoad" draw:mime-type="image/png"/></draw:frame><text:soft-page-break/><text:span text:style-name="Strong_20_Emphasis"><text:span text:style-name="T57"/></text:span></text:p>
      <text:p text:style-name="P54"><draw:frame draw:style-name="fr1" draw:name="Görüntü9" text:anchor-type="char" svg:x="-0.019cm" svg:y="-0.268cm" svg:width="7.966cm" svg:height="8.056cm" draw:z-index="8"><draw:image xlink:href="Pictures/10000001000005C6000005DEE1BDE4A6.png" xlink:type="simple" xlink:show="embed" xlink:actuate="onLoad" draw:mime-type="image/png"/></draw:frame><text:span text:style-name="Strong_20_Emphasis"><text:span text:style-name="T57"/></text:span></text:p>
      <text:p text:style-name="P54"><text:span text:style-name="Strong_20_Emphasis"><text:span text:style-name="T57"/></text:span></text:p>
      <text:p text:style-name="P54"><text:span text:style-name="Strong_20_Emphasis"><text:span text:style-name="T57"/></text:span></text:p>
      <text:p text:style-name="P54"><text:span text:style-name="Strong_20_Emphasis"><text:span text:style-name="T57"/></text:span></text:p>
      <text:p text:style-name="P54"><text:span text:style-name="Strong_20_Emphasis"><text:span text:style-name="T57"/></text:span></text:p>
      <text:p text:style-name="P54"><text:span text:style-name="Strong_20_Emphasis"><text:span text:style-name="T57"/></text:span></text:p>
      <text:p text:style-name="P54"><text:span text:style-name="Strong_20_Emphasis"><text:span text:style-name="T57"/></text:span></text:p>
      <text:p text:style-name="P54"><text:span text:style-name="Strong_20_Emphasis"><text:span text:style-name="T57"/></text:span></text:p>
      <text:p text:style-name="P54"><text:span text:style-name="Strong_20_Emphasis"><text:span text:style-name="T57"/></text:span></text:p>
      <text:p text:style-name="P54"><text:span text:style-name="Strong_20_Emphasis"><text:span text:style-name="T57"/></text:span></text:p>
      <text:p text:style-name="P54"><text:span text:style-name="Strong_20_Emphasis"><text:span text:style-name="T57"/></text:span></text:p>
      <text:p text:style-name="P54"><text:span text:style-name="Strong_20_Emphasis"><text:span text:style-name="T57">ECR NEDİR</text:span></text:span></text:p>
      <text:p text:style-name="P54"><text:span text:style-name="Strong_20_Emphasis"><text:span text:style-name="T57"/></text:span></text:p>
      <text:p text:style-name="P54"><text:span text:style-name="Strong_20_Emphasis"><text:span text:style-name="T59">Mühendislik değişiklik talebi (ECR) formu, bir ürün tasarımına önerilen bir iyileştirme veya düzeltmeyi tanımlamak için kullanılır. Form, değişiklik sürecini başlatır ve mühendislik ekibi içinde, değişikliğin etkisini ve en iyi olası çözümü belirlemeye yardımcı olacak tartışmaları teşvik eder.</text:span></text:span><text:span text:style-name="Strong_20_Emphasis"><text:span text:style-name="T57"> </text:span></text:span></text:p>
      <text:h text:style-name="P56" text:outline-level="2"><text:span text:style-name="Strong_20_Emphasis"><text:span text:style-name="T57">Değişiklik taleplerine örnekler:</text:span></text:span></text:h>
      <text:p text:style-name="P57"><text:span text:style-name="Strong_20_Emphasis"><text:span text:style-name="T53">Mühendislik değişiklik talebi (ECR)</text:span></text:span><text:span text:style-name="T53">  </text:span></text:p>
      <text:p text:style-name="P54"><text:span text:style-name="Strong_20_Emphasis"><text:span text:style-name="T60">Üretim Değişiklik Talebi (MCR)</text:span></text:span><text:span text:style-name="Strong_20_Emphasis"><text:span text:style-name="T57"> </text:span></text:span></text:p>
      <text:p text:style-name="P54"><text:span text:style-name="Strong_20_Emphasis"><text:span text:style-name="T60">Belge Değişiklik Talebi (DCR)</text:span></text:span><text:span text:style-name="Strong_20_Emphasis"><text:span text:style-name="T57"> </text:span></text:span></text:p>
      <text:p text:style-name="P54"><text:span text:style-name="Strong_20_Emphasis"><text:span text:style-name="T60">Düzeltici işlem talebi (CAR)</text:span></text:span><text:span text:style-name="Strong_20_Emphasis"><text:span text:style-name="T57"> </text:span></text:span></text:p>
      <text:p text:style-name="P54"><text:span text:style-name="Strong_20_Emphasis"><text:span text:style-name="T60">Saha Arıza Talebi (FFR)</text:span></text:span><text:span text:style-name="Strong_20_Emphasis"><text:span text:style-name="T57"> </text:span></text:span></text:p>
      <text:p text:style-name="P54"><text:span text:style-name="Strong_20_Emphasis"><text:span text:style-name="T60">Tedarikçi düzeltici işlem talebi (SCAR)</text:span></text:span><text:span text:style-name="Strong_20_Emphasis"><text:span text:style-name="T57">  </text:span></text:span></text:p>
      <text:p text:style-name="P54"><text:span text:style-name="Strong_20_Emphasis"><text:span text:style-name="T57"/></text:span></text:p>
      <text:p text:style-name="P58"><text:span text:style-name="Strong_20_Emphasis"><text:span text:style-name="T61">ECO NEDİR</text:span></text:span></text:p>
      <text:p text:style-name="P58"><text:span text:style-name="Strong_20_Emphasis"><text:span text:style-name="T61">Mühendislik değişiklik emri (ECO), yeni ürün tasarım detaylarını veya mevcut ürünlerde önerilen değişiklikleri belirten bir belgedir. ECO'lar, etkilenen tüm bileşenlerin, montajların ve diğer belgelerin bir listesini sağlar. Mühendislik </text:span></text:span><text:soft-page-break/><text:span text:style-name="Strong_20_Emphasis"><text:span text:style-name="T61">değişiklik emri, mühendislik, kalite, tedarik, üretim ve çoğu durumda harici tasarım ekipleri veya tedarik zinciri ortakları da dahil olmak üzere tüm kilit paydaşlara (değişiklik kontrol kurulu veya "CCB") gönderilir. Her CCB üyesi, değişiklik emrinin etkisini ve ECO'nun planlandığı gibi ve zamanında uygulanıp uygulanamayacağını belirlemekten sorumludur. CCB üyeleri değişikliği onaylar veya reddeder ve tüm CCB üyeleri ECO'yu onayladığında, değişiklik uygulanabilir.</text:span></text:span></text:p>
      <text:p text:style-name="Text_20_body"><text:span text:style-name="T62"><text:line-break/></text:span><text:span text:style-name="Strong_20_Emphasis"><text:span text:style-name="T63">ERP Yazılımının Temel Bileşenleri</text:span></text:span></text:p>
      <text:list text:style-name="L16">
        <text:list-item>
          <text:p text:style-name="P59"><text:span text:style-name="Strong_20_Emphasis"><text:span text:style-name="T64">Modüller:</text:span></text:span><text:span text:style-name="T64"> ERP sistemleri, farklı iş fonksiyonlarına hizmet eden birden fazla modülden oluşur. Bu modüller arasında finans ve muhasebe, insan kaynakları, tedarik, envanter yönetimi, satış ve pazarlama, üretim ve daha fazlası yer alabilir.</text:span></text:p>
        </text:list-item>
        <text:list-item>
          <text:p text:style-name="P59"><text:span text:style-name="Strong_20_Emphasis"><text:span text:style-name="T64">Veritabanı:</text:span></text:span><text:span text:style-name="T64"> ERP sistemleri, ilgili tüm verileri depolayan merkezi bir veritabanına dayanır. Bu veritabanı, yazılımın omurgasını oluşturarak farklı departmanlar ve modüller arasında veri tutarlılığını ve bütünlüğünü sağlar.</text:span></text:p>
        </text:list-item>
        <text:list-item>
          <text:p text:style-name="P59"><text:span text:style-name="Strong_20_Emphasis"><text:span text:style-name="T64">Kullanıcı Arayüzü:</text:span></text:span><text:span text:style-name="T64"> ERP yazılımı genellikle, her seviyedeki çalışanın sisteme erişmesine ve sistemle etkileşim kurmasına olanak tanıyan kullanıcı dostu bir arayüz sunar. Bu erişilebilirlik, verimli veri girişi, veri alma ve analizini destekler.</text:span></text:p>
        </text:list-item>
        <text:list-item>
          <text:p text:style-name="P60"><text:span text:style-name="Strong_20_Emphasis"><text:span text:style-name="T64">Raporlama ve Analiz:</text:span></text:span><text:span text:style-name="T64"> ERP sistemleri genellikle güçlü raporlama ve analiz araçları içerir. Bu özellikler, işletmelerin özelleştirilmiş raporlar oluşturmasına, temel performans göstergelerini (KPI'lar) izlemesine ve faaliyetlerine ilişkin içgörüler elde etmesine olanak tanıyarak bilinçli karar vermeyi kolaylaştırır.</text:span></text:p>
        </text:list-item>
      </text:list>
      <text:p text:style-name="Text_20_body"><text:span text:style-name="Strong_20_Emphasis"><text:span text:style-name="T61"/></text:span></text:p>
      <text:h text:style-name="P61" text:outline-level="3"><text:span text:style-name="Strong_20_Emphasis"><text:span text:style-name="T65">İSO NEDİR</text:span></text:span></text:h>
      <text:p text:style-name="P62"><text:span text:style-name="Strong_20_Emphasis"><text:span text:style-name="T66"> </text:span></text:span><text:span text:style-name="Strong_20_Emphasis"><text:span text:style-name="T67">Firmalar ayakta kalabilmek için müşteri isteklerine uygun ürün üretimi veya hizmet sağlamalıdır. Bu nedenle ürünün üretim aşamasından müşterinin eline ulaşmasına kadar geçen süredeki bütün faaliyetleri kapsayacak bir </text:span></text:span><text:span text:style-name="Strong_20_Emphasis"><text:span text:style-name="T68">Kalite Yönetim Sistemi</text:span></text:span><text:span text:style-name="Strong_20_Emphasis"><text:span text:style-name="T66"> </text:span></text:span><text:span text:style-name="Strong_20_Emphasis"><text:span text:style-name="T67">uygulanması şarttır. Kalite yönetim sistemleri içerisinde en önde gelen ve en çok ilgi gören sistem </text:span></text:span><text:span text:style-name="Strong_20_Emphasis"><text:span text:style-name="T68">ISO 9001</text:span></text:span><text:span text:style-name="Strong_20_Emphasis"><text:span text:style-name="T66"> </text:span></text:span><text:span text:style-name="Strong_20_Emphasis"><text:span text:style-name="T68">Kalite Yönetim Sistemi</text:span></text:span><text:span text:style-name="Strong_20_Emphasis"><text:span text:style-name="T66"> </text:span></text:span><text:span text:style-name="Strong_20_Emphasis"><text:span text:style-name="T67">standartları serisidir. </text:span></text:span><text:span text:style-name="Strong_20_Emphasis"><text:span text:style-name="T68">ISO 9001</text:span></text:span><text:span text:style-name="Strong_20_Emphasis"><text:span text:style-name="T66"> </text:span></text:span><text:span text:style-name="Strong_20_Emphasis"><text:span text:style-name="T67">Standardı, bir kuruluşun müşteri şartlarını ve uygulanabilir mevzuat şartlarını karşılayan ürünü veya hizmeti sağlama yeteneği olduğunu kanıtlaması gerektiğinde ve müşteri memnuniyetini artırmayı amaçladığında uyacağı </text:span></text:span><text:span text:style-name="Strong_20_Emphasis"><text:span text:style-name="T68">Kalite Yönetim Sistemi</text:span></text:span><text:span text:style-name="Strong_20_Emphasis"><text:span text:style-name="T67">nin </text:span></text:span><text:span text:style-name="Strong_20_Emphasis"><text:span text:style-name="T68">Şartları</text:span></text:span><text:span text:style-name="Strong_20_Emphasis"><text:span text:style-name="T67">nı belirtir.</text:span></text:span><text:span text:style-name="Strong_20_Emphasis"><text:span text:style-name="T65"> </text:span></text:span></text:p>
      <text:p text:style-name="P62"><text:span text:style-name="Strong_20_Emphasis"><text:span text:style-name="T69">ERP</text:span></text:span><text:span text:style-name="Strong_20_Emphasis"><text:span text:style-name="T67"> </text:span></text:span><text:span text:style-name="Strong_20_Emphasis"><text:span text:style-name="T69">Kalite Yönetim Modülü</text:span></text:span><text:span text:style-name="Strong_20_Emphasis"><text:span text:style-name="T67"> </text:span></text:span><text:span text:style-name="Strong_20_Emphasis"><text:span text:style-name="T69">Kalite Kontrol</text:span></text:span><text:span text:style-name="Strong_20_Emphasis"><text:span text:style-name="T67"> faaliyetlerinin dijital ortamda yapılmasını sağlayarak harcanan zamanı, eforu en aza indirmeyi ve genel kaliteyi sürekli iyileştirmeyi amaçlar.</text:span></text:span></text:p>
      <text:p text:style-name="P63"><text:soft-page-break/><text:span text:style-name="T27">Kontrol süreci hammadde stok girişiyle başlar. Stok girişinde kalite hedeflerinden ve malzemeye ait bilgilerden yola çıkarak elde edilen verilerle birlikte </text:span><text:span text:style-name="Strong_20_Emphasis"><text:span text:style-name="T17">Kalite Kontrol</text:span></text:span><text:span text:style-name="T27"> </text:span><text:span text:style-name="Strong_20_Emphasis"><text:span text:style-name="T17">Kayıtları</text:span></text:span><text:span text:style-name="T27"> oluşturulur. </text:span><text:span text:style-name="Strong_20_Emphasis"><text:span text:style-name="T17">Kalite Kontrol</text:span></text:span><text:span text:style-name="T27"> </text:span><text:span text:style-name="Strong_20_Emphasis"><text:span text:style-name="T17">İşlemi</text:span></text:span><text:span text:style-name="T27">nden onay almayan ürünler </text:span><text:span text:style-name="Strong_20_Emphasis"><text:span text:style-name="T17">ERP</text:span></text:span><text:span text:style-name="T27"> </text:span><text:span text:style-name="Strong_20_Emphasis"><text:span text:style-name="T17">Stok Yönetimi Modülü</text:span></text:span><text:span text:style-name="T27">nde ayrı tutulurlar ve genel olarak </text:span><text:span text:style-name="Strong_20_Emphasis"><text:span text:style-name="T17">ERP</text:span></text:span><text:span text:style-name="T27"> modüllerinde işlem için stok çıkışı yapamazlar.</text:span></text:p>
      <text:p text:style-name="P63"><text:span text:style-name="T27">Kontrolün türü ve hangi sıklıkta yapılacağı </text:span><text:span text:style-name="Strong_20_Emphasis"><text:span text:style-name="T17">Kontrol Planı</text:span></text:span><text:span text:style-name="T27"> ile yönetilir. Kontrolün gerçekleştirilmesi gerekip gerekmediğine ilişkin bilgi ise malzeme ana verilerinde kaydedilen kalite güvence ilişkili temel verilerden alınır.</text:span></text:p>
      <text:p text:style-name="P64"><text:span text:style-name="Strong_20_Emphasis"><text:span text:style-name="T70">FRM NEDİR</text:span></text:span></text:p>
      <text:p text:style-name="P64"><text:a xlink:type="simple" xlink:href="http://www.garp.org/#!/home" office:target-frame-name="_blank" xlink:show="new" text:style-name="Internet_20_link" text:visited-style-name="Visited_20_Internet_20_Link"><text:span text:style-name="Strong_20_Emphasis"><text:span text:style-name="T71">Küresel Risk Profesyonelleri Birliği™ (GARP® ) tarafından</text:span></text:span></text:a><text:span text:style-name="Strong_20_Emphasis"><text:span text:style-name="T72"> </text:span></text:span><text:span text:style-name="Strong_20_Emphasis"><text:span text:style-name="T71">sunulan FRM unvanı, kazanabileceğiniz bir finansal risk yönetimi sertifikasıdır. Birçok önde gelen finans firması, sektörün "altın standardı"na ulaşmış olarak görüldükleri için Sertifikalı FRM'leri istihdam etmektedir. FRM unvanı, günümüzün sürekli değişen finans piyasalarındaki temel risk yönetimi kavramlarını güçlü bir şekilde anladığınızı gösterir.</text:span></text:span><text:span text:style-name="Strong_20_Emphasis"><text:span text:style-name="T70"> </text:span></text:span></text:p>
      <text:p text:style-name="P54"><text:span text:style-name="Strong_20_Emphasis"><text:span text:style-name="T59">Finansal risk yöneticisi, bir işletmenin varlıklarına, kazanç kapasitesine veya başarısına yönelik tehditleri belirler ve analiz eder. Finansal risk yöneticileri satış, kredi verme, ticaret, pazarlama, finansal hizmetler veya özel bankacılık alanlarında çalışırlar. Birçoğu kredi veya piyasa riski gibi alanlarda uzmanlaşmıştır. </text:span></text:span><text:span text:style-name="Strong_20_Emphasis"><text:span text:style-name="T57"> </text:span></text:span></text:p>
      <text:p text:style-name="P54"><text:span text:style-name="Strong_20_Emphasis"><text:span text:style-name="T57"/></text:span></text:p>
      <text:p text:style-name="P64"><text:span text:style-name="Strong_20_Emphasis"><text:span text:style-name="T70">HRM NEDİR</text:span></text:span></text:p>
      <text:p text:style-name="P54"><text:span text:style-name="Strong_20_Emphasis"><text:span text:style-name="T73">Kurumların çalışanlarını planlama, yönetme ve geliştirme süreçlerini kapsayan, insan kaynağını işletme hedefleriyle uyumlu şekilde ele alan bir yönetim yaklaşımıdır.</text:span></text:span><text:span text:style-name="T74"/></text:p>
      <text:p text:style-name="P54"><text:span text:style-name="Strong_20_Emphasis"><text:span text:style-name="T75"/></text:span></text:p>
      <text:p text:style-name="P65">MES (Manufacturing Execution System - Üretim Yürütme Sistemi)</text:p>
      <text:p text:style-name="P66">Üretim sahasındaki ham maddelerin nihai ürüne dönüşene kadar olan gerçek zamanlı operasyonlarını izleyen, kontrol eden ve belgeleyen yazılım sistemidir.</text:p>
      <text:p text:style-name="P66"><text:span text:style-name="T76">ERP ve MES Farkı Nedir:</text:span> ERP "Neden ve ne zaman üreteceğiz?" (Stratejik/Mali planlama) sorusuna yanıt verirken; MES "Şu an sahada ne oluyor, makine hangi hızda çalışıyor, hangi operatör hangi işi yapıyor?" (Anlık/Operasyonel yürütme) sorusuna yanıt verir.</text:p>
      <text:p text:style-name="P66"><text:span text:style-name="T76">OEE (Overall Equipment Effectiveness - Toplam Ekipman Verimliliği):</text:span> Kullanılabilirlik, performans ve kalite çarpanlarıyla makine verimliliğini ölçen temel MES metriği.</text:p>
      <text:list text:style-name="L17">
        <text:list-item>
          <text:p text:style-name="P67"><text:soft-page-break/><text:span text:style-name="T76">Duruş Yönetimi:</text:span> Makinelerin arıza, ayar (setup) veya malzeme bekletme gibi nedenlerle plansız duruşlarının anlık takibi.</text:p>
        </text:list-item>
      </text:list>
      <text:h text:style-name="P68" text:outline-level="3">PS (Advanced Planning and Scheduling - Gelişmiş Planlama ve Çizelgeleme)</text:h>
      <text:h text:style-name="P69" text:outline-level="3"><text:s/>Klasik MRP'nin "sonsuz kapasite" varsayımını yıkan; malzeme, iş gücü, makine kapasitesi ve lojistik kısıtlarını eş zamanlı olarak optimize eden, arka planda gelişmiş matematiksel modeller ve sezgisel algoritmalar kullanan sistemlerdir.</text:h>
      <text:h text:style-name="P69" text:outline-level="3">Fabrikadaki karmaşık sipariş sıralama (sequencing) problemlerini çözer. Örneğin, bir boyama hattında açıktan koyu renge doğru üretim sıralaması yaparak temizlik (setup) sürelerini minimize eder.</text:h>
      <text:h text:style-name="P68" text:outline-level="3">WMS (Warehouse Management System - Depo Yönetim Sistemi)</text:h>
      <text:p text:style-name="P70"><text:a xlink:type="simple" xlink:href="https://www.sap.com/turkey/products/scm/extended-warehouse-management.html" text:style-name="Internet_20_link" text:visited-style-name="Visited_20_Internet_20_Link"><text:span text:style-name="T77">WMS yazılım sistemleri</text:span></text:a><text:span text:style-name="T78">, tedarik zinciri yönetiminin temel bileşenlerinden biridir ve bir şirketin depolarında ve nakliyedeki stokunun tamamına ilişkin gerçek zamanlı görünürlük sunar. Stok yönetimine ek olarak DYS, çekme ve ambalajlama süreçleri, kaynak kullanımı, analitik ve daha fazlası için araçlar sunar.</text:span></text:p>
      <text:p text:style-name="P70"><text:span text:style-name="Strong_20_Emphasis"><text:span text:style-name="T77">DYS anlamı:</text:span></text:span><text:span text:style-name="T78"> </text:span><text:span text:style-name="T78">Depo yönetim sistemi, şirketlerin günlük depo operasyonlarını yönetmesine ve kontrol etmesine, mal ve malzemelerin bir dağıtım veya sipariş karşılama merkezine girdiği andan ayrıldıkları ana kadar kontrol etmesine yardımcı olan bir yazılımdır.</text:span></text:p>
      <text:p text:style-name="P71">Modern depo yönetim sistemleri (WMS) gerçek zamanlı envanter görünürlüğünü sağlamada, iş akışlarını optimize etmede ve sorunsuz çoklu kanal karşılamayı desteklemede kritik bir rol oynar. Bu güçler daha hızlı, daha akıllı ve daha verimli depo yönetimini sadece bir rekabet avantajı değil, bir zorunluluktur.</text:p>
      <text:p text:style-name="P72"><draw:frame draw:style-name="fr1" draw:name="Görüntü12" text:anchor-type="char" svg:x="1.679cm" svg:y="0.353cm" svg:width="14.45cm" svg:height="10.687cm" draw:z-index="11"><draw:image xlink:href="Pictures/10000000000002EB000002D002C266F8.png" xlink:type="simple" xlink:show="embed" xlink:actuate="onLoad" draw:mime-type="image/png"/></draw:frame><text:soft-page-break/></text:p>
      <text:h text:style-name="P73" text:outline-level="2"><text:bookmark text:name="depo-yönetim-sisteminin-beş-avantajı"/>Depo yönetim sisteminin beş avantajı</text:h>
      <text:p text:style-name="P70"><text:span text:style-name="Strong_20_Emphasis"><text:span text:style-name="T77">Gelişmiş operasyonel verimlilik</text:span></text:span></text:p>
      <text:p text:style-name="P70"><text:span text:style-name="Strong_20_Emphasis"><text:span text:style-name="T77">Daha düşük atık ve maliyetler</text:span></text:span></text:p>
      <text:p text:style-name="P70"><text:span text:style-name="Strong_20_Emphasis"><text:span text:style-name="T77">Gerçek zamanlı envanter görünürlüğü</text:span></text:span></text:p>
      <text:p text:style-name="P70"><text:span text:style-name="Strong_20_Emphasis"><text:span text:style-name="T77">Gelişmiş işgücü yönetimi</text:span></text:span></text:p>
      <text:p text:style-name="P70"><text:span text:style-name="Strong_20_Emphasis"><text:span text:style-name="T77">Daha iyi müşteri ve </text:span></text:span><text:a xlink:type="simple" xlink:href="https://www.sap.com/turkey/resources/supplier-relationship-management-srm" text:style-name="Internet_20_link" text:visited-style-name="Visited_20_Internet_20_Link"><text:span text:style-name="Strong_20_Emphasis"><text:span text:style-name="T79">tedarikçi ilişkileri</text:span></text:span></text:a><text:span text:style-name="Strong_20_Emphasis"><text:span text:style-name="T77"> </text:span></text:span></text:p>
      <text:list text:style-name="L18">
        <text:list-item>
          <text:list>
            <text:list-item>
              <text:p text:style-name="P74"><text:span text:style-name="T76">Adresleme (Slotting):</text:span> Ürünlerin depo içindeki optimum raflara yerleştirilmesi (hızlı satan ürünlerin kapıya yakın olması).</text:p>
            </text:list-item>
            <text:list-item>
              <text:p text:style-name="P74"><text:span text:style-name="T76">Toplama Rotaları (Picking):</text:span> Depo personelinin sipariş toplarken yürüyeceği mesafeyi en aza indiren akıllı rotalama algoritmaları.</text:p>
            </text:list-item>
            <text:list-item>
              <text:p text:style-name="P74"><text:span text:style-name="T76">RFID ve Barkod Entegrasyonu:</text:span> Mal kabul ve sevkiyat süreçlerinin sıfır hata ile otomasyonu.</text:p>
            </text:list-item>
          </text:list>
        </text:list-item>
      </text:list>
      <text:h text:style-name="P75" text:outline-level="3">TMS (Transportation Management System - Taşıma Yönetim Sistemi)</text:h>
      <text:p text:style-name="P76"><text:span text:style-name="T80">Ulaşım yönetim sistemi (TMS), şirketlerin fiziksel malların kara, hava, deniz veya bu ulaşım modlarının bir kombinasyonuyla taşınmasıyla ilgili lojistiği yönetmelerine yardımcı olan bir yazılım sistemidir. Daha geniş tedarik zinciri yönetim sisteminin bir </text:span><text:soft-page-break/><text:span text:style-name="T80">parçası olan TMS lojistik yazılımı, yükleri ve teslimat rotalarını optimize ederek, yerel ve küresel rotalarda kargoyu takip ederek ve ticaret uyumluluk belgeleri ve kargo faturalandırması gibi daha önce zaman alan görevleri otomatikleştirerek malların zamanında teslim edilmesini sağlar. Bir TMS sistemi, hem işletmeler hem de son müşteriler için maliyetleri düşürür.</text:span> </text:p>
      <text:p text:style-name="P76">Ürünlerin fiziki olarak bir noktadan diğerine taşınmasını planlayan, uygulayan ve optimize eden lojistik yazılımıdır.</text:p>
      <text:p text:style-name="P76">Araç rota optimizasyonu, navlun maliyeti analizi, taşıyıcı (lojistik firması) seçimi ve sevkiyatın yold<draw:frame draw:style-name="fr1" draw:name="Görüntü11" text:anchor-type="char" svg:x="0.697cm" svg:y="2.701cm" svg:width="14.845cm" svg:height="8.543cm" draw:z-index="10"><draw:image xlink:href="Pictures/1000000000000300000001BA748CCF46.png" xlink:type="simple" xlink:show="embed" xlink:actuate="onLoad" draw:mime-type="image/png"/></draw:frame>ayken anlık takibi (tracking).</text:p>
      <text:p text:style-name="P76"/>
      <text:p text:style-name="P76"/>
      <text:p text:style-name="P76"/>
      <text:p text:style-name="P76"><text:span text:style-name="T76">EAM (Enterprise Asset Management - Kurumsal Varlık Yönetimi):</text:span> ERP sistemi şirketin finansını ve envanterini yönetirken, EAM doğrudan üretim hatlarındaki makinelerin, araç filolarının ve tesislerin fiziksel sağlığını, bakım-onarım döngülerini ve amortisman ömürlerini yönetir. MES sistemiyle entegre çalışarak arıza duruşlarını minimize eder. </text:p>
      <text:p text:style-name="P76"/>
      <text:p text:style-name="P76"/>
      <text:h text:style-name="P77" text:outline-level="2"><text:soft-page-break/>ERP'nin iş değeri</text:h>
      <text:p text:style-name="P76">Günümüzün iş dünyasında ERP'nin etkisi göz ardı edilemez. Kurumsal veriler ve süreçler ERP sistemlerinde toplandıkça işletmeler, ayrı departmanları birbirleriyle uyumlu hâle getirip iş akışlarını iyileştirerek önemli tasarruflar elde edebilirler. Belirli iş avantajlarına bazı örnekler:</text:p>
      <text:list text:style-name="L19">
        <text:list-item>
          <text:p text:style-name="P78"><text:span text:style-name="Strong_20_Emphasis"><text:span text:style-name="T81">Geliştirilmiş iş içgörüleri</text:span></text:span><text:span text:style-name="T77">: Raporlarla oluşturulan gerçek zamanlı bilgilerden elde edilir</text:span></text:p>
        </text:list-item>
        <text:list-item>
          <text:p text:style-name="P78"><text:span text:style-name="Strong_20_Emphasis"><text:span text:style-name="T81">Daha düşük operasyon maliyetleri</text:span></text:span><text:span text:style-name="T77">: Düzenli iş süreçleri ve en iyi uygulamalarla sağlanır</text:span></text:p>
        </text:list-item>
        <text:list-item>
          <text:p text:style-name="P78"><text:span text:style-name="Strong_20_Emphasis"><text:span text:style-name="T81">Artan iş birliği</text:span></text:span><text:span text:style-name="T77">: Kullanıcıların sözleşmelerde, , isteklerde ve satın alma siparişlerinde veri paylaşması sayesinde sağlanır</text:span></text:p>
        </text:list-item>
        <text:list-item>
          <text:p text:style-name="P78"><text:span text:style-name="Strong_20_Emphasis"><text:span text:style-name="T81">Verimlilik artışı</text:span></text:span><text:span text:style-name="T77">: Birçok işletme biriminde ve iyi tanımlanmış işletme süreçlerinde ortak bir kullanıcı deneyimi sayesinde sağlanır</text:span></text:p>
        </text:list-item>
        <text:list-item>
          <text:p text:style-name="P78"><text:span text:style-name="Strong_20_Emphasis"><text:span text:style-name="T81">Tutarlı altyapı</text:span></text:span><text:span text:style-name="T77">: Arka ofisten ön ofise, tüm iş faaliyetleri aynı görünümü ve hissi verir</text:span></text:p>
        </text:list-item>
        <text:list-item>
          <text:p text:style-name="P78"><text:span text:style-name="Strong_20_Emphasis"><text:span text:style-name="T81">Daha yüksek kullanıcı benimseme oranları</text:span></text:span><text:span text:style-name="T77">: Ortak bir kullanıcı deneyimi ve tasarımla elde edilir</text:span></text:p>
        </text:list-item>
        <text:list-item>
          <text:p text:style-name="P78"><text:span text:style-name="Strong_20_Emphasis"><text:span text:style-name="T81">Azalan risk</text:span></text:span><text:span text:style-name="T77">: Geliştirilmiş veri bütünlüğü ve finansal kontroller sayesinde sağlanır</text:span></text:p>
        </text:list-item>
        <text:list-item>
          <text:p text:style-name="P78"><text:span text:style-name="T77">Düzgün biçimlendirilmiş ve entegre sistemlerle </text:span><text:span text:style-name="Strong_20_Emphasis"><text:span text:style-name="T81">daha düşük yönetim ve operasyon maliyetleri</text:span></text:span></text:p>
        </text:list-item>
      </text:list>
      <text:p text:style-name="P76"/>
      <text:h text:style-name="P79" text:outline-level="2"><text:bookmark text:name="4c8a"/><text:span text:style-name="Strong_20_Emphasis"><text:span text:style-name="T82">ERP Yazılım Geliştirme Süreci</text:span></text:span></text:h>
      <text:h text:style-name="P80" text:outline-level="3">ERP Hedeflerini ve Beklentilerini Tanımlayın</text:h>
      <text:p text:style-name="P81">ERP sisteminin hedeflerini, beklentilerini ve gereksinimlerini anlayın. Bu aşama, ERP sisteminin belirli kurumsal ihtiyaç ve zorluklara yönelik olarak oluşturulmasını sağlar. Başarılı bir uygulamanın temelidir.</text:p>
      <text:h text:style-name="P82" text:outline-level="3">Sistem Planlaması ve Tasarımı</text:h>
      <text:p text:style-name="P81">Ardından, görevleri, kaynakları ve potansiyel ERP geliştirme risklerini özetleyen ayrıntılı bir yol haritası oluşturun. Sistemi önceden planlamak ve tasarlamak, geliştiricilerin kaynakları verimli bir şekilde tahsis etmelerine, bağımlılıkları yönetmelerine ve proje zaman çizelgelerine uymalarına yardımcı olur.</text:p>
      <text:h text:style-name="P82" text:outline-level="3"><text:soft-page-break/>Geliştirme ve Özelleştirme</text:h>
      <text:p text:style-name="P83"><text:span text:style-name="T83">Bu aşama, işletmenin özel ihtiyaçlarına uyacak şekilde temel ERP bileşenlerinin oluşturulmasını ve uyarlanmasını içerir. Uygun bir teknoloji yığını seçilmiş ve bir ekip oluşturulmuştur. Planlanan </text:span><text:a xlink:type="simple" xlink:href="https://langate.com/news-and-blog/emr-integration-ultimate-guide/#:~:text=UI/UX%20Design%20%26%20Prototyping" office:target-frame-name="_blank" xlink:show="new" text:style-name="Internet_20_link" text:visited-style-name="Visited_20_Internet_20_Link"><text:span text:style-name="T84">tasarımın gerçek yazılıma dönüştüğü</text:span></text:a><text:span text:style-name="T83"> yer burasıdır . Özellikler ve işlevler de organizasyonel gereksinimlerle uyumlu olacak şekilde özelleştirilecektir.</text:span></text:p>
      <text:h text:style-name="P84" text:outline-level="4"><text:span text:style-name="Strong_20_Emphasis"><text:span text:style-name="T85">ERP Yazılım Geliştirme için Teknoloji Yığını</text:span></text:span></text:h>
      <table:table table:name="Tablo1" table:style-name="Tablo1">
        <table:table-column table:style-name="Tablo1.A"/>
        <table:table-column table:style-name="Tablo1.B"/>
        <table:table-row>
          <table:table-cell table:style-name="Tablo1.A1" office:value-type="string">
            <text:p text:style-name="P85"><text:span text:style-name="Strong_20_Emphasis"><text:span text:style-name="T86">Ön uç teknolojileri</text:span></text:span></text:p>
          </table:table-cell>
          <table:table-cell table:style-name="Tablo1.A1" office:value-type="string">
            <text:p text:style-name="P85"><text:span text:style-name="Strong_20_Emphasis"><text:span text:style-name="T86">Arka uç teknolojileri</text:span></text:span></text:p>
          </table:table-cell>
        </table:table-row>
        <table:table-row>
          <table:table-cell table:style-name="Tablo1.A1" office:value-type="string">
            <text:p text:style-name="P86">Bootstrap</text:p>
          </table:table-cell>
          <table:table-cell table:style-name="Tablo1.A1" office:value-type="string">
            <text:p text:style-name="P86">Node.js</text:p>
          </table:table-cell>
        </table:table-row>
        <table:table-row>
          <table:table-cell table:style-name="Tablo1.A1" office:value-type="string">
            <text:p text:style-name="P86">Javascript</text:p>
          </table:table-cell>
          <table:table-cell table:style-name="Tablo1.A1" office:value-type="string">
            <text:p text:style-name="P86">Java</text:p>
          </table:table-cell>
        </table:table-row>
        <table:table-row>
          <table:table-cell table:style-name="Tablo1.A1" office:value-type="string">
            <text:p text:style-name="P86">Angular JS</text:p>
          </table:table-cell>
          <table:table-cell table:style-name="Tablo1.A1" office:value-type="string">
            <text:p text:style-name="P86">.Net Çerçevesi</text:p>
          </table:table-cell>
        </table:table-row>
        <table:table-row>
          <table:table-cell table:style-name="Tablo1.A1" office:value-type="string">
            <text:p text:style-name="P86">React</text:p>
          </table:table-cell>
          <table:table-cell table:style-name="Tablo1.A1" office:value-type="string">
            <text:p text:style-name="P86">Python</text:p>
          </table:table-cell>
        </table:table-row>
        <table:table-row>
          <table:table-cell table:style-name="Tablo1.A1" office:value-type="string">
            <text:p text:style-name="P86">Vue.js</text:p>
          </table:table-cell>
          <table:table-cell table:style-name="Tablo1.A1" office:value-type="string">
            <text:p text:style-name="P86"/>
          </table:table-cell>
        </table:table-row>
        <table:table-row>
          <table:table-cell table:style-name="Tablo1.A1" office:value-type="string">
            <text:p text:style-name="P85"><text:span text:style-name="Strong_20_Emphasis"><text:span text:style-name="T86">Entegrasyon</text:span></text:span></text:p>
          </table:table-cell>
          <table:table-cell table:style-name="Tablo1.A1" office:value-type="string">
            <text:p text:style-name="P85"><text:span text:style-name="Strong_20_Emphasis"><text:span text:style-name="T86">Veritabanı</text:span></text:span></text:p>
          </table:table-cell>
        </table:table-row>
        <table:table-row>
          <table:table-cell table:style-name="Tablo1.A1" office:value-type="string">
            <text:p text:style-name="P86">Amazon EC2</text:p>
          </table:table-cell>
          <table:table-cell table:style-name="Tablo1.A1" office:value-type="string">
            <text:p text:style-name="P86">MySQL</text:p>
          </table:table-cell>
        </table:table-row>
        <table:table-row>
          <table:table-cell table:style-name="Tablo1.A1" office:value-type="string">
            <text:p text:style-name="P86">Amazon S3</text:p>
          </table:table-cell>
          <table:table-cell table:style-name="Tablo1.A1" office:value-type="string">
            <text:p text:style-name="P86">Oracle</text:p>
          </table:table-cell>
        </table:table-row>
        <table:table-row>
          <table:table-cell table:style-name="Tablo1.A1" office:value-type="string">
            <text:p text:style-name="P86">Socket.io</text:p>
          </table:table-cell>
          <table:table-cell table:style-name="Tablo1.A1" office:value-type="string">
            <text:p text:style-name="P86">MongoDB</text:p>
          </table:table-cell>
        </table:table-row>
        <table:table-row>
          <table:table-cell table:style-name="Tablo1.A1" office:value-type="string">
            <text:p text:style-name="P86">Google Çalışma Alanı</text:p>
          </table:table-cell>
          <table:table-cell table:style-name="Tablo1.A1" office:value-type="string">
            <text:p text:style-name="P87"/>
          </table:table-cell>
        </table:table-row>
      </table:table>
      <text:h text:style-name="P82" text:outline-level="3">Üçüncü Taraf Ürünlerle Entegrasyon</text:h>
      <text:p text:style-name="P81">ERP sistemi ile mevcut üçüncü taraf ürünler arasında sorunsuz veri alışverişinin sağlanması çok önemlidir. Bu, özel entegrasyonlar veya API'ler aracılığıyla yapılabilir. Bu aşama, ERP sisteminin faydasını en üst düzeye çıkarmak ve farklı platformlar arasında birlikte çalışabilirliği sağlamak için kritik öneme sahiptir.</text:p>
      <text:h text:style-name="P82" text:outline-level="3">Test ve Kalite Güvencesi</text:h>
      <text:p text:style-name="P83"><text:span text:style-name="T83">ERP sisteminin işlevsellik, performans ve güvenilirlik standartlarını karşıladığından emin olmak için </text:span><text:a xlink:type="simple" xlink:href="http://langate.com/service/software-testing-and-qa-services/" office:target-frame-name="_blank" xlink:show="new" text:style-name="Internet_20_link" text:visited-style-name="Visited_20_Internet_20_Link"><text:span text:style-name="T84">kapsamlı testler</text:span></text:a><text:span text:style-name="T83"> gerçekleştirin . Detaylı testler, olası sorunları veya hataları erken aşamada belirlemeye ve gidermeye yardımcı olur. Bu aşama, aksaklıkları en aza indirmeye ve istikrarlı, güvenilir bir sistem sağlamaya yardımcı olur.</text:span></text:p>
      <text:h text:style-name="P82" text:outline-level="3"><text:soft-page-break/>Görevlendirme ve Eğitim</text:h>
      <text:p text:style-name="P81">Son olarak, devreye alma hazırlıkları yapın. Bu aşama, sistemin yapılandırılmasını, kullanıcı erişiminin ayarlanmasını ve yazılımın kullanıma sunulmasını içerir. Çalışanların sorunsuz bir şekilde benimsemesini sağlamak için eğitim verilmesi gerekebilir.</text:p>
      <text:p text:style-name="P88">USB NEDİR</text:p>
      <text:p text:style-name="P76"><text:span text:style-name="T80">Kurumsal hizmet veri yolu (ESB), farklı uygulamalar arasında gerçek zamanlı veri alışverişini destekleyen bir yazılım mimarisi modelidir. Büyük kuruluşlarda çeşitli veri modellerini, protokolleri ve güvenlik kısıtlamalarını kullanarak çeşitli işlevleri yerine getiren birden fazla uygulama vardır. ESB, veri dönüştürme, protokol dönüştürme, mesaj yönlendirme gibi işlemleri gerçekleştirerek uygulama entegrasyonunu kolaylaştırır. Uygulamalar ilgili verileri ESB’ye geçirir, o da bu verileri bunlara ihtiyacı olan diğer uygulamalara dönüştürür ve iletir.</text:span> </text:p>
      <text:h text:style-name="P79" text:outline-level="2"><text:span text:style-name="Strong_20_Emphasis"><text:span text:style-name="T40">ISO 9001 Kalite Yönetim Sistemi Nedir?</text:span></text:span></text:h>
      <text:p text:style-name="P89"><text:span text:style-name="T83">ISO 9001, ürün ve hizmet kalitesini artırmalarını sağlayacak bir yol haritası sunan yönetim sistemi standardıdır. Uluslararası Standartlar Örgütü (ISO) tarafından yayımlanan standart, işletmelere aynı zamanda müşteri memnuniyeti süreçlerini iyileştirmesi konusunda yön gösteren konumdadır. ISO 9001, sektör ve büyüklük ayrımı olmaksızın her ticari organizasyon tarafından uygulanabilir.</text:span><text:span text:style-name="T77"><text:line-break/></text:span><text:span text:style-name="T83">"Planla, Uygula, Kontrol Et, Önlem Al" döngüsüne sahip ISO 9001 Kalite Yönetim Sistemi, 7 temel prensip üzerine kuruludur. Söz konusu prensipler:</text:span><text:span text:style-name="T77"><text:line-break/></text:span><text:span text:style-name="Strong_20_Emphasis"><text:span text:style-name="T40">Müşteri Odaklılık:</text:span></text:span><text:span text:style-name="T78"> </text:span><text:span text:style-name="T83">Müşteri memnuniyeti ve beklentilerinin eksiksiz karşılanması, standardın temel amacını oluşturur. İşletme, bu amaç doğrultusunda müşterinin ihtiyaçlarını anlamaya yönelik stratejiler uygulamalıdır.</text:span><text:span text:style-name="T77"><text:line-break/></text:span><text:span text:style-name="Strong_20_Emphasis"><text:span text:style-name="T40">Liderlik:</text:span></text:span><text:span text:style-name="T78"> </text:span><text:span text:style-name="T83">Üst yönetim, liderlik rolünü üstlenerek işletmenin vizyon ve hedeflerini belirlemelidir. Ardından personelin bu hedeflere ulaşması sürecine rehberlik etmelidir. Güçlü bir rehberlik sayesinde hem çalışan motivasyonu hem de süreç etkinliği artar.</text:span><text:span text:style-name="T77"><text:line-break/></text:span><text:span text:style-name="Strong_20_Emphasis"><text:span text:style-name="T40">Personel Katılımı:</text:span></text:span><text:span text:style-name="T78"> </text:span><text:span text:style-name="T83">İşletmelerin başarısı, büyük oranda çalışanların bilgi, beceri ve bağlılığına dayanır. Organizasyonel bağlılığı artırmak amacıyla çalışanların süreçlere katılımı teşvik edilmeli ve yetkinliklerini geliştirebilecekleri çalışmalar yapılmalıdır.</text:span><text:span text:style-name="T77"><text:line-break/></text:span><text:span text:style-name="Strong_20_Emphasis"><text:span text:style-name="T40">Süreç Yaklaşımı:</text:span></text:span><text:span text:style-name="T78"> </text:span><text:span text:style-name="T83">İşletmelerin verimlilik ve hizmet kalitelerini artırmaları için operasyonel süreçlerin tanımlanması, yönetilmesi, optimize edilmesi gerekir. Süreç yaklaşımı ilkesine bağlı kalındığı takdirde kaynak kullanımı, işlevsel tutarlılık açısından avantaj elde edilip israf oranı azaltılabilir.</text:span><text:span text:style-name="T77"><text:line-break/></text:span><text:soft-page-break/><text:span text:style-name="Strong_20_Emphasis"><text:span text:style-name="T40">İyileştirme: </text:span></text:span><text:span text:style-name="T83">Kalite yönetim sisteminin temel ilkeleri arasında ticari organizasyonun her seviyesinde sürekli iyileştirme yapılması da yer alır. Söz konusu yaklaşım, işletmenin değişen pazar koşullarına uyum sağlamasını ve rekabet avantajı elde etmesini destekler. Organizasyonel esneklik artarken maliyetlerde düşüş gözlemlenebilir.</text:span><text:span text:style-name="T77"><text:line-break/></text:span><text:span text:style-name="Strong_20_Emphasis"><text:span text:style-name="T40">Kanıta Dayalı Karar Verme:</text:span></text:span><text:span text:style-name="T78"> </text:span><text:span text:style-name="T83">Etkin kararlar vermek için veriye dayalı analiz süreçleri gerçekleştirilmelidir. Kanıta dayalı karar verme ilkesine uygun hareket edildiğinde, problemlerin temel nedenlerini anlamak ve hatalı yöntemleri uygulamaktan kaçınmak kolaylaşır.</text:span><text:span text:style-name="T77"><text:line-break/></text:span><text:span text:style-name="Strong_20_Emphasis"><text:span text:style-name="T40">İlişki Yönetimi:</text:span></text:span><text:span text:style-name="T78"> </text:span><text:span text:style-name="T83">İşletmenin uzun vadeli başarısında etkili faktörlerin başında tüm iş ortakları ve müşteriler ile güçlü ve sürdürülebilir ilişkiler kurulması ilkesi gelir. Güçlü iş ortaklıklarının kurulması, ciro hedeflerine ulaşmayı kolaylaştırır ve değer yaratma süreçlerinde iyileşme sağlar.</text:span><text:span text:style-name="T77"> </text:span></text:p>
      <text:p text:style-name="P76"/>
      <text:h text:style-name="P79" text:outline-level="2"><text:span text:style-name="Strong_20_Emphasis"><text:span text:style-name="T85">SCADA Nedir? </text:span></text:span><text:span text:style-name="T83"> </text:span></text:h>
      <text:p text:style-name="P90"><text:span text:style-name="T87">SCADA</text:span><text:span text:style-name="T88"> terimi, </text:span><text:a xlink:type="simple" xlink:href="https://tr.wikipedia.org/wiki/İngilizce" text:style-name="Internet_20_link" text:visited-style-name="Visited_20_Internet_20_Link"><text:span text:style-name="T89">İngilizce</text:span></text:a><text:span text:style-name="T88"> "Supervisory Control and Data Acquisition" (</text:span><text:a xlink:type="simple" xlink:href="https://tr.wikipedia.org/wiki/Türkçe" text:style-name="Internet_20_link" text:visited-style-name="Visited_20_Internet_20_Link"><text:span text:style-name="T89">Türkçe</text:span></text:a><text:span text:style-name="T88">: Gözetleyici Kontrol ve Veri Toplama Sistemi) kelimelerinin ilk harflerinin okunması ile oluşturulan bir kısaltmadır. Kapsamlı ve </text:span><text:a xlink:type="simple" xlink:href="https://tr.wikipedia.org/wiki/Entegre_devre" text:style-name="Internet_20_link" text:visited-style-name="Visited_20_Internet_20_Link"><text:span text:style-name="T89">entegre</text:span></text:a><text:span text:style-name="T88"> bir </text:span><text:a xlink:type="simple" xlink:href="https://tr.wikipedia.org/wiki/Veri" text:style-name="Internet_20_link" text:visited-style-name="Visited_20_Internet_20_Link"><text:span text:style-name="T89">veri</text:span></text:a><text:span text:style-name="T88"> tabanlı kontrol ve izleme sistemi olan SCADA ile bir tesise veya işletmeye ait tüm ekipmanların kontrolünden </text:span><text:a xlink:type="simple" xlink:href="https://tr.wikipedia.org/wiki/Üretim" text:style-name="Internet_20_link" text:visited-style-name="Visited_20_Internet_20_Link"><text:span text:style-name="T89">üretim</text:span></text:a><text:span text:style-name="T88"> planlamasına, çevre kontrol ünitelerinden yardımcı işletmelere kadar tüm birimlerin otomatik kontrolü, gözetlenmesi ve sonuçların raporlanması sağlanabilir. Temel olarak SCADA yazılımından izleme, kontrol, </text:span><text:a xlink:type="simple" xlink:href="https://tr.wikipedia.org/wiki/Veri_toplama" text:style-name="Internet_20_link" text:visited-style-name="Visited_20_Internet_20_Link"><text:span text:style-name="T89">veri toplama</text:span></text:a><text:span text:style-name="T88">, verilerin kaydı ve saklanması işlevlerini gerçekleştirmesi beklenmektedir.</text:span></text:p>
      <text:p text:style-name="P91"><text:span text:style-name="T83">SCADA sistemleri </text:span><text:a xlink:type="simple" xlink:href="https://tr.wikipedia.org/wiki/Endüstriyel_süreç" text:style-name="Internet_20_link" text:visited-style-name="Visited_20_Internet_20_Link"><text:span text:style-name="T90">endüstriyel proseslerde</text:span></text:a><text:span text:style-name="T83">, üretim, </text:span><text:a xlink:type="simple" xlink:href="https://tr.wikipedia.org/wiki/Enerji" text:style-name="Internet_20_link" text:visited-style-name="Visited_20_Internet_20_Link"><text:span text:style-name="T90">enerji üretimi</text:span></text:a><text:span text:style-name="T83">, </text:span><text:a xlink:type="simple" xlink:href="https://tr.wikipedia.org/wiki/İmalat" text:style-name="Internet_20_link" text:visited-style-name="Visited_20_Internet_20_Link"><text:span text:style-name="T90">imalat</text:span></text:a><text:span text:style-name="T83"> ve </text:span><text:a xlink:type="simple" xlink:href="https://tr.wikipedia.org/wiki/Rafineri" text:style-name="Internet_20_link" text:visited-style-name="Visited_20_Internet_20_Link"><text:span text:style-name="T90">rafinerilerde</text:span></text:a><text:span text:style-name="T83"> sürekli, kesintili, tekrarlayan ya da ayrık modlarda çalışabilir. </text:span><text:a xlink:type="simple" xlink:href="https://tr.wikipedia.org/wiki/Altyapı_(anlam_ayrımı)" text:style-name="Internet_20_link" text:visited-style-name="Visited_20_Internet_20_Link"><text:span text:style-name="T90">Altyapı işlemleri</text:span></text:a><text:span text:style-name="T83">, </text:span><text:a xlink:type="simple" xlink:href="https://tr.wikipedia.org/wiki/Kamu" text:style-name="Internet_20_link" text:visited-style-name="Visited_20_Internet_20_Link"><text:span text:style-name="T90">kamu</text:span></text:a><text:span text:style-name="T83"> veya </text:span><text:a xlink:type="simple" xlink:href="https://tr.wikipedia.org/wiki/Özel_sektör" text:style-name="Internet_20_link" text:visited-style-name="Visited_20_Internet_20_Link"><text:span text:style-name="T90">özel sektörlerde</text:span></text:a><text:span text:style-name="T83"> </text:span><text:a xlink:type="simple" xlink:href="https://tr.wikipedia.org/wiki/Su_arıtma" text:style-name="Internet_20_link" text:visited-style-name="Visited_20_Internet_20_Link"><text:span text:style-name="T91">su arıtma</text:span></text:a><text:span text:style-name="T83"> ve terfi merkezlerinde, </text:span><text:a xlink:type="simple" xlink:href="https://tr.wikipedia.org/wiki/Atık_su_arıtma" text:style-name="Internet_20_link" text:visited-style-name="Visited_20_Internet_20_Link"><text:span text:style-name="T90">atıksu arıtma</text:span></text:a><text:span text:style-name="T83">, </text:span><text:a xlink:type="simple" xlink:href="https://tr.wikipedia.org/wiki/Petrol" text:style-name="Internet_20_link" text:visited-style-name="Visited_20_Internet_20_Link"><text:span text:style-name="T90">petrol</text:span></text:a><text:span text:style-name="T83"> ve </text:span><text:a xlink:type="simple" xlink:href="https://tr.wikipedia.org/wiki/Gaz" text:style-name="Internet_20_link" text:visited-style-name="Visited_20_Internet_20_Link"><text:span text:style-name="T90">gaz</text:span></text:a><text:span text:style-name="T83"> boru hatları, </text:span><text:a xlink:type="simple" xlink:href="https://tr.wikipedia.org/wiki/Elektrik" text:style-name="Internet_20_link" text:visited-style-name="Visited_20_Internet_20_Link"><text:span text:style-name="T90">elektrik</text:span></text:a><text:span text:style-name="T83"> iletim ve dağıtım, </text:span><text:a xlink:type="simple" xlink:href="https://tr.wikipedia.org/wiki/Rüzgâr_türbini" text:style-name="Internet_20_link" text:visited-style-name="Visited_20_Internet_20_Link"><text:span text:style-name="T90">rüzgâr türbinleri</text:span></text:a><text:span text:style-name="T83">, </text:span><text:a xlink:type="simple" xlink:href="https://tr.wikipedia.org/wiki/Sivil_savunma" text:style-name="Internet_20_link" text:visited-style-name="Visited_20_Internet_20_Link"><text:span text:style-name="T90">sivil savunma</text:span></text:a><text:span text:style-name="T83"> </text:span><text:a xlink:type="simple" xlink:href="https://tr.wikipedia.org/wiki/Siren" text:style-name="Internet_20_link" text:visited-style-name="Visited_20_Internet_20_Link"><text:span text:style-name="T90">siren</text:span></text:a><text:span text:style-name="T83"> sistemleri ve büyük iletişim sistemlerini içerebilir. Tesis binaları, </text:span><text:a xlink:type="simple" xlink:href="https://tr.wikipedia.org/wiki/Havaalanı" text:style-name="Internet_20_link" text:visited-style-name="Visited_20_Internet_20_Link"><text:span text:style-name="T90">havaalanları</text:span></text:a><text:span text:style-name="T83">, </text:span><text:a xlink:type="simple" xlink:href="https://tr.wikipedia.org/wiki/Gemi" text:style-name="Internet_20_link" text:visited-style-name="Visited_20_Internet_20_Link"><text:span text:style-name="T90">gemiler</text:span></text:a><text:span text:style-name="T83"> ve </text:span><text:a xlink:type="simple" xlink:href="https://tr.wikipedia.org/wiki/Uzay_istasyonu" text:style-name="Internet_20_link" text:visited-style-name="Visited_20_Internet_20_Link"><text:span text:style-name="T90">uzay istasyonları</text:span></text:a><text:span text:style-name="T83"> da dahil olmak üzere </text:span><text:a xlink:type="simple" xlink:href="https://tr.wikipedia.org/wiki/Kamu" text:style-name="Internet_20_link" text:visited-style-name="Visited_20_Internet_20_Link"><text:span text:style-name="T90">kamu</text:span></text:a><text:span text:style-name="T83"> ve özel tesisleri kapsayabilir. </text:span><text:a xlink:type="simple" xlink:href="https://tr.wikipedia.org/wiki/Isıtma" text:style-name="Internet_20_link" text:visited-style-name="Visited_20_Internet_20_Link"><text:span text:style-name="T90">Isıtma</text:span></text:a><text:span text:style-name="T83"> ve havalandırma (</text:span><text:a xlink:type="simple" xlink:href="https://tr.wikipedia.org/wiki/HVAC" text:style-name="Internet_20_link" text:visited-style-name="Visited_20_Internet_20_Link"><text:span text:style-name="T90">HVAC</text:span></text:a><text:span text:style-name="T83">) sistemlerinde erişim ve </text:span><text:a xlink:type="simple" xlink:href="https://tr.wikipedia.org/wiki/Enerji" text:style-name="Internet_20_link" text:visited-style-name="Visited_20_Internet_20_Link"><text:span text:style-name="T90">enerji</text:span></text:a><text:span text:style-name="T83"> tüketimini kontrol ve izleme gerekebilir.</text:span></text:p>
      <text:p text:style-name="P90"><text:span text:style-name="T88">Kapsamlı ve </text:span><text:a xlink:type="simple" xlink:href="https://tr.wikipedia.org/wiki/Entegre_devre" text:style-name="Internet_20_link" text:visited-style-name="Visited_20_Internet_20_Link"><text:span text:style-name="T89">entegre</text:span></text:a><text:span text:style-name="T88"> bir SCADA sistemi sayesinde bir tesise veya </text:span><text:a xlink:type="simple" xlink:href="https://tr.wikipedia.org/wiki/İşletme" text:style-name="Internet_20_link" text:visited-style-name="Visited_20_Internet_20_Link"><text:span text:style-name="T89">işletmeye</text:span></text:a><text:span text:style-name="T88"> ait tüm cihazların kontrolünden </text:span><text:a xlink:type="simple" xlink:href="https://tr.wikipedia.org/wiki/Üretim" text:style-name="Internet_20_link" text:visited-style-name="Visited_20_Internet_20_Link"><text:span text:style-name="T89">üretim</text:span></text:a><text:span text:style-name="T88"> planlamasına, </text:span><text:a xlink:type="simple" xlink:href="https://tr.wikipedia.org/wiki/Çevre_(sistemler)" text:style-name="Internet_20_link" text:visited-style-name="Visited_20_Internet_20_Link"><text:span text:style-name="T89">çevre</text:span></text:a><text:span text:style-name="T88"> kontrol ünitelerinden yardımcı işletmelere kadar tüm birimlerin otomatik kontrolü ve gözlenmesi sağlanabilir. Anlık olay ve </text:span><text:a xlink:type="simple" xlink:href="https://tr.wikipedia.org/wiki/Alarm" text:style-name="Internet_20_link" text:visited-style-name="Visited_20_Internet_20_Link"><text:span text:style-name="T89">alarmları</text:span></text:a><text:span text:style-name="T88"> saklayarak geçmişte meydana gelen olayları da tekrar günün tarihinde ve saatinde gözlemleyebilmeyi de sağlayan geniş kapsamlı bir sistemdir.</text:span></text:p>
      <text:p text:style-name="P92"><text:soft-page-break/><text:span text:style-name="T83">Bu tür sistemler “katmanlaşan” (</text:span><text:a xlink:type="simple" xlink:href="https://tr.wikipedia.org/wiki/İngilizce" text:style-name="Internet_20_link" text:visited-style-name="Visited_20_Internet_20_Link"><text:span text:style-name="T90">İngilizce</text:span></text:a><text:span text:style-name="T83">: </text:span><text:span text:style-name="T92">scalable</text:span><text:span text:style-name="T83">) özelliklerinden dolayı değişik </text:span><text:a xlink:type="simple" xlink:href="https://tr.wikipedia.org/wiki/İşletme" text:style-name="Internet_20_link" text:visited-style-name="Visited_20_Internet_20_Link"><text:span text:style-name="T90">işletmelerin</text:span></text:a><text:span text:style-name="T83"> tüm kontrol ihtiyaçlarını kademeli olarak gerçekleştirilmelerine imkân verir.</text:span></text:p>
      <text:p text:style-name="P93">Bu katmanlar:</text:p>
      <text:list text:style-name="L20">
        <text:list-item>
          <text:p text:style-name="P94">İşletme Kaynak Yönetim Katmanı</text:p>
        </text:list-item>
        <text:list-item>
          <text:p text:style-name="P94">İşletme Yönetim Katmanı</text:p>
        </text:list-item>
        <text:list-item>
          <text:p text:style-name="P94">Süreç Denetim Katmanı</text:p>
        </text:list-item>
        <text:list-item>
          <text:p text:style-name="P94">İşletme Kontrol Katmanıdır</text:p>
        </text:list-item>
      </text:list>
      <text:h text:style-name="P95" text:outline-level="2"><text:bookmark text:name="ams#what-isc1#pattern-data"/>Dijital İkiz Teknolojisi nedir?</text:h>
      <text:p text:style-name="P96">Dijital ikiz, fiziksel bir nesnenin sanal bir modelidir. Nesnenin yaşam döngüsünü kapsar ve davranışı simüle etmek ve işlemleri izlemek için nesnedeki sensörlerden gönderilen gerçek zamanlı verileri kullanır. Dijital ikizler, bir fabrikadaki tek ekipman parçalarından rüzgar türbinleri ve hatta tüm şehirler gibi tam kurulumlara kadar gerçek dünyadaki pek çok öğenin kopyasını oluşturabilir. Dijital ikiz teknolojisi, bir varlığın performansını denetlemenize, olası hataları belirlemenize, ayrıca bakım ve yaşam döngüsü hakkında daha bilinçli kararlar almanıza olanak tanır.</text:p>
      <text:p text:style-name="P97">Avantajlar:</text:p>
      <text:h text:style-name="P98" text:outline-level="3"><text:span text:style-name="Strong_20_Emphasis"><text:span text:style-name="T93">Geliştirilmiş performans</text:span></text:span></text:h>
      <text:p text:style-name="P99">Dijital ikizler tarafından sağlanan gerçek zamanlı bilgiler ve öngörüler; ekipmanınızın, fabrikanızın veya tesislerinizin performansını optimize etmenizi sağlar. Sorunlar ortaya çıktıkça ele alınabilir ve böylece sistemlerin en iyi şekilde çalışması sağlanır ve arıza süreleri azalır.</text:p>
      <text:h text:style-name="P100" text:outline-level="3"><text:span text:style-name="Strong_20_Emphasis"><text:span text:style-name="T94">Tahmine dayalı özellikler</text:span></text:span></text:h>
      <text:p text:style-name="P99">Dijital ikizler, binlerce ekipmandan oluşsa bile üretim fabrikanızın, ticari binanızın veya tesisinizin eksiksiz bir resmini ve dijital görünümünü sunabilir. Akıllı sensörler her bileşenin çıktısını izleyerek sorunları veya arızaları meydana geldiği anda belirtir. Ekipmanın tamamen bozulmasını beklemek yerine, sorunların ilk belirtisinde harekete geçebilirsiniz.</text:p>
      <text:h text:style-name="P100" text:outline-level="3"><text:span text:style-name="Strong_20_Emphasis"><text:span text:style-name="T94">Uzaktan izleme</text:span></text:span></text:h>
      <text:p text:style-name="P99">Dijital ikizlerin sanal yapısı, tesisleri uzaktan izleyebileceğiniz ve kontrol edebileceğiniz anlamına gelir. Uzaktan izleme aynı zamanda daha az insanın <text:soft-page-break/>potansiyel olarak tehlikeli endüstriyel ekipmanı kontrol etmesi gerektiği anlamına gelir.</text:p>
      <text:h text:style-name="P100" text:outline-level="3"><text:span text:style-name="Strong_20_Emphasis"><text:span text:style-name="T94">Hızlandırılmış üretim süresi</text:span></text:span></text:h>
      <text:p text:style-name="P101">Dijital kopyalar oluşturarak ürün ve tesislerin üretim süresini henüz üretilmeden önce hızlandırabilirsiniz. Senaryolar çalıştırarak, ürününüzün veya tesisinizin arızalara nasıl tepki verdiğini görebilir ve esas üretime geçmeden önce gerekli değişiklikleri yapabilirsiniz.</text:p>
      <text:p text:style-name="P102"/>
      <text:p text:style-name="P76"/>
      <text:p text:style-name="P76"/>
      <text:p text:style-name="P6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 Sans" svg:font-family="'Open Sans'"/>
    <style:font-face style:name="OpenSymbol" svg:font-family="OpenSymbol" style:font-charset="x-symbol"/>
    <style:font-face style:name="Poppins" svg:font-family="Poppins, sans-serif"/>
    <style:font-face style:name="TT Norms" svg:font-family="'TT Norms', Helvetica, Arial, sans-serif"/>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tr" fo:country="T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tr" fo:country="T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6-15T09:04:32.069061100</meta:creation-date>
    <dc:date>2026-06-15T19:16:13.572799800</dc:date>
    <meta:editing-duration>PT37M9S</meta:editing-duration>
    <meta:editing-cycles>6</meta:editing-cycles>
    <meta:generator>LibreOffice/25.8.6.2$Windows_X86_64 LibreOffice_project/b4b39682cd9868fa725bc664aff94278d315bd04</meta:generator>
    <meta:document-statistic meta:table-count="1" meta:image-count="12" meta:object-count="0" meta:page-count="32" meta:paragraph-count="288" meta:word-count="6626" meta:character-count="52650" meta:non-whitespace-character-count="46322"/>
  </office:meta>
</office:document-meta>
</file>